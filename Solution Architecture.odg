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80000021FC0F77A4C.jpg" manifest:media-type="image/jpeg"/>
  <manifest:file-entry manifest:full-path="Pictures/100000010000025100000030D18CA9FA.png" manifest:media-type="image/png"/>
  <manifest:file-entry manifest:full-path="Pictures/10000000000004E5000002AE4037A274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1b3a6b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8" style:family="graphic" style:parent-style-name="standard">
      <style:graphic-properties draw:stroke="none" draw:fill="solid" draw:fill-color="#e7e6e6" loext:decorative="false"/>
    </style:style>
    <style:style style:name="gr9" style:family="graphic" style:parent-style-name="standard">
      <style:graphic-properties draw:stroke="none" draw:fill="solid" draw:fill-color="#ffffff" loext:decorative="false"/>
    </style:style>
    <style:style style:name="gr10" style:family="graphic" style:parent-style-name="standard">
      <style:graphic-properties draw:stroke="none" draw:fill="solid" draw:fill-color="#000000" loext:decorative="false"/>
    </style:style>
    <style:style style:name="gr11" style:family="graphic" style:parent-style-name="standard">
      <style:graphic-properties draw:stroke="solid" svg:stroke-width="0.088cm" svg:stroke-color="#1b3a6b" draw:stroke-linejoin="round" svg:stroke-linecap="butt" draw:fill="none" fo:padding-top="0.044cm" fo:padding-bottom="0.044cm" fo:padding-left="0.044cm" fo:padding-right="0.044cm" loext:decorative="false"/>
    </style:style>
    <style:style style:name="gr12" style:family="graphic" style:parent-style-name="standard">
      <style:graphic-properties draw:stroke="solid" svg:stroke-width="0.088cm" svg:stroke-color="#0b7a75" draw:stroke-linejoin="round" svg:stroke-linecap="butt" draw:fill="none" fo:padding-top="0.044cm" fo:padding-bottom="0.044cm" fo:padding-left="0.044cm" fo:padding-right="0.044cm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pt" style:font-size-asian="14pt" style:font-size-complex="14pt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P4" style:family="paragraph">
      <loext:graphic-properties draw:fill="none"/>
      <style:text-properties fo:font-size="13pt" style:font-size-asian="13pt" style:font-size-complex="13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solid" draw:fill-color="#1b3a6b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</style:style>
    <style:style style:name="P9" style:family="paragraph">
      <loext:graphic-properties draw:fill="solid" draw:fill-color="#e7e6e6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T1" style:family="text">
      <style:text-properties fo:color="#000000" loext:opacity="100%"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T2" style:family="text">
      <style:text-properties fo:color="#000000" loext:opacity="100%" style:font-name="Calibri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3" style:family="text">
      <style:text-properties fo:color="#000000" loext:opacity="100%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T4" style:family="text">
      <style:text-properties fo:color="#000000" loext:opacity="100%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5" style:family="text">
      <style:text-properties fo:color="#000000" loext:opacity="100%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T6" style:family="text">
      <style:text-properties fo:color="#000000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7" style:family="text">
      <style:text-properties fo:color="#000000" loext:opacity="100%" style:font-name="Calibri" fo:font-size="10pt" fo:font-style="italic" fo:font-weight="normal" style:font-name-asian="Calibri" style:font-size-asian="10pt" style:font-style-asian="italic" style:font-weight-asian="normal" style:font-name-complex="Calibri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289cm" svg:height="0.497cm" svg:x="8.377cm" svg:y="2.876cm">
          <draw:text-box>
            <text:p text:style-name="P1"><text:span text:style-name="T1">P</text:span><text:span text:style-name="T1">r</text:span><text:span text:style-name="T1">o</text:span><text:span text:style-name="T1">j</text:span><text:span text:style-name="T1">e</text:span><text:span text:style-name="T1">c</text:span><text:span text:style-name="T1">t</text:span><text:span text:style-name="T1"> </text:span><text:span text:style-name="T1">D</text:span><text:span text:style-name="T1">e</text:span><text:span text:style-name="T1">s</text:span><text:span text:style-name="T1">i</text:span><text:span text:style-name="T1">g</text:span><text:span text:style-name="T1">n</text:span><text:span text:style-name="T1"> </text:span><text:span text:style-name="T1">P</text:span><text:span text:style-name="T1">h</text:span><text:span text:style-name="T1">a</text:span><text:span text:style-name="T1">s</text:span><text:span text:style-name="T1">e</text:span></text:p>
          </draw:text-box>
        </draw:frame>
        <draw:frame draw:style-name="gr2" draw:text-style-name="P3" draw:layer="layout" svg:width="0.387cm" svg:height="0.39cm" svg:x="12.648cm" svg:y="2.956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4.049cm" svg:height="0.458cm" svg:x="8.491cm" svg:y="3.622cm">
          <draw:text-box>
            <text:p text:style-name="P1"><text:span text:style-name="T3">Solutio</text:span><text:span text:style-name="T3">n </text:span><text:span text:style-name="T3">Architec</text:span><text:span text:style-name="T3">ture</text:span></text:p>
          </draw:text-box>
        </draw:frame>
        <draw:frame draw:style-name="gr2" draw:text-style-name="P3" draw:layer="layout" svg:width="0.387cm" svg:height="0.39cm" svg:x="12.534cm" svg:y="3.675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696cm" svg:height="0.352cm" svg:x="2.59cm" svg:y="4.358cm">
          <draw:text-box>
            <text:p text:style-name="P1"><text:span text:style-name="T4">Date</text:span></text:p>
          </draw:text-box>
        </draw:frame>
        <draw:frame draw:style-name="gr2" draw:text-style-name="P3" draw:layer="layout" svg:width="0.387cm" svg:height="0.39cm" svg:x="3.282cm" svg:y="4.331cm">
          <draw:text-box>
            <text:p text:style-name="P1"><text:span text:style-name="T2"><text:s/></text:span></text:p>
          </draw:text-box>
        </draw:frame>
        <draw:polygon draw:style-name="gr5" draw:text-style-name="P6" draw:layer="layout" svg:width="0.021cm" svg:height="0.162cm" svg:x="2.562cm" svg:y="4.128cm" svg:viewBox="0 0 22 163" draw:points="0,0 22,0 22,163 0,163">
          <text:p/>
        </draw:polygon>
        <draw:polygon draw:style-name="gr5" draw:text-style-name="P6" draw:layer="layout" svg:width="0.021cm" svg:height="0.021cm" svg:x="2.562cm" svg:y="4.128cm" svg:viewBox="0 0 22 22" draw:points="0,0 22,0 22,22 0,22">
          <text:p/>
        </draw:polygon>
        <draw:polygon draw:style-name="gr5" draw:text-style-name="P6" draw:layer="layout" svg:width="5.265cm" svg:height="0.021cm" svg:x="2.583cm" svg:y="4.128cm" svg:viewBox="0 0 5266 22" draw:points="0,0 5266,0 5266,22 0,22">
          <text:p/>
        </draw:polygon>
        <draw:polygon draw:style-name="gr5" draw:text-style-name="P6" draw:layer="layout" svg:width="0.021cm" svg:height="0.141cm" svg:x="7.848cm" svg:y="4.149cm" svg:viewBox="0 0 22 142" draw:points="0,0 22,0 22,142 0,142">
          <text:p/>
        </draw:polygon>
        <draw:polygon draw:style-name="gr5" draw:text-style-name="P6" draw:layer="layout" svg:width="0.021cm" svg:height="0.021cm" svg:x="7.848cm" svg:y="4.128cm" svg:viewBox="0 0 22 22" draw:points="0,0 22,0 22,22 0,22">
          <text:p/>
        </draw:polygon>
        <draw:polygon draw:style-name="gr5" draw:text-style-name="P6" draw:layer="layout" svg:width="10.573cm" svg:height="0.021cm" svg:x="7.869cm" svg:y="4.128cm" svg:viewBox="0 0 10574 22" draw:points="0,0 10574,0 10574,22 0,22">
          <text:p/>
        </draw:polygon>
        <draw:polygon draw:style-name="gr5" draw:text-style-name="P6" draw:layer="layout" svg:width="0.021cm" svg:height="0.162cm" svg:x="18.442cm" svg:y="4.128cm" svg:viewBox="0 0 22 163" draw:points="0,0 22,0 22,163 0,163">
          <text:p/>
        </draw:polygon>
        <draw:polygon draw:style-name="gr5" draw:text-style-name="P6" draw:layer="layout" svg:width="0.021cm" svg:height="0.021cm" svg:x="18.442cm" svg:y="4.128cm" svg:viewBox="0 0 22 22" draw:points="0,0 22,0 22,22 0,22">
          <text:p/>
        </draw:polygon>
        <draw:polygon draw:style-name="gr5" draw:text-style-name="P6" draw:layer="layout" svg:width="0.021cm" svg:height="0.642cm" svg:x="2.562cm" svg:y="4.29cm" svg:viewBox="0 0 22 643" draw:points="0,0 22,0 22,643 0,643">
          <text:p/>
        </draw:polygon>
        <draw:polygon draw:style-name="gr5" draw:text-style-name="P6" draw:layer="layout" svg:width="0.021cm" svg:height="0.642cm" svg:x="7.848cm" svg:y="4.29cm" svg:viewBox="0 0 22 643" draw:points="0,0 22,0 22,643 0,643">
          <text:p/>
        </draw:polygon>
        <draw:polygon draw:style-name="gr5" draw:text-style-name="P6" draw:layer="layout" svg:width="0.021cm" svg:height="0.642cm" svg:x="18.442cm" svg:y="4.29cm" svg:viewBox="0 0 22 643" draw:points="0,0 22,0 22,643 0,643">
          <text:p/>
        </draw:polygon>
        <draw:frame draw:style-name="gr2" draw:text-style-name="P3" draw:layer="layout" svg:width="1.984cm" svg:height="0.39cm" svg:x="7.876cm" svg:y="4.36cm">
          <draw:text-box>
            <text:p text:style-name="P1"><text:span text:style-name="T2">30 </text:span><text:span text:style-name="T2">Jun </text:span><text:span text:style-name="T2">2026 </text:span></text:p>
          </draw:text-box>
        </draw:frame>
        <draw:frame draw:style-name="gr4" draw:text-style-name="P5" draw:layer="layout" svg:width="1.207cm" svg:height="0.352cm" svg:x="2.59cm" svg:y="5.162cm">
          <draw:text-box>
            <text:p text:style-name="P1"><text:span text:style-name="T4">T</text:span><text:span text:style-name="T4">e</text:span><text:span text:style-name="T4">a</text:span><text:span text:style-name="T4">m</text:span><text:span text:style-name="T4"> </text:span><text:span text:style-name="T4">I</text:span><text:span text:style-name="T4">D</text:span></text:p>
          </draw:text-box>
        </draw:frame>
        <draw:frame draw:style-name="gr2" draw:text-style-name="P3" draw:layer="layout" svg:width="0.387cm" svg:height="0.39cm" svg:x="3.769cm" svg:y="5.136cm">
          <draw:text-box>
            <text:p text:style-name="P1"><text:span text:style-name="T2"><text:s/></text:span></text:p>
          </draw:text-box>
        </draw:frame>
        <draw:polygon draw:style-name="gr5" draw:text-style-name="P6" draw:layer="layout" svg:width="0.021cm" svg:height="0.162cm" svg:x="2.562cm" svg:y="4.932cm" svg:viewBox="0 0 22 163" draw:points="0,0 22,0 22,163 0,163">
          <text:p/>
        </draw:polygon>
        <draw:polygon draw:style-name="gr5" draw:text-style-name="P6" draw:layer="layout" svg:width="5.265cm" svg:height="0.021cm" svg:x="2.583cm" svg:y="4.932cm" svg:viewBox="0 0 5266 22" draw:points="0,0 5266,0 5266,22 0,22">
          <text:p/>
        </draw:polygon>
        <draw:polygon draw:style-name="gr5" draw:text-style-name="P6" draw:layer="layout" svg:width="0.021cm" svg:height="0.162cm" svg:x="7.848cm" svg:y="4.932cm" svg:viewBox="0 0 22 163" draw:points="0,0 22,0 22,163 0,163">
          <text:p/>
        </draw:polygon>
        <draw:polygon draw:style-name="gr5" draw:text-style-name="P6" draw:layer="layout" svg:width="10.573cm" svg:height="0.021cm" svg:x="7.869cm" svg:y="4.932cm" svg:viewBox="0 0 10574 22" draw:points="0,0 10574,0 10574,22 0,22">
          <text:p/>
        </draw:polygon>
        <draw:polygon draw:style-name="gr5" draw:text-style-name="P6" draw:layer="layout" svg:width="0.021cm" svg:height="0.162cm" svg:x="18.442cm" svg:y="4.932cm" svg:viewBox="0 0 22 163" draw:points="0,0 22,0 22,163 0,163">
          <text:p/>
        </draw:polygon>
        <draw:polygon draw:style-name="gr5" draw:text-style-name="P6" draw:layer="layout" svg:width="0.021cm" svg:height="0.642cm" svg:x="2.562cm" svg:y="5.095cm" svg:viewBox="0 0 22 643" draw:points="0,0 22,0 22,643 0,643">
          <text:p/>
        </draw:polygon>
        <draw:polygon draw:style-name="gr5" draw:text-style-name="P6" draw:layer="layout" svg:width="0.021cm" svg:height="0.642cm" svg:x="7.848cm" svg:y="5.095cm" svg:viewBox="0 0 22 643" draw:points="0,0 22,0 22,643 0,643">
          <text:p/>
        </draw:polygon>
        <draw:polygon draw:style-name="gr5" draw:text-style-name="P6" draw:layer="layout" svg:width="0.021cm" svg:height="0.642cm" svg:x="18.442cm" svg:y="5.095cm" svg:viewBox="0 0 22 643" draw:points="0,0 22,0 22,643 0,643">
          <text:p/>
        </draw:polygon>
        <draw:frame draw:style-name="gr2" draw:text-style-name="P3" draw:layer="layout" svg:width="0.387cm" svg:height="0.39cm" svg:x="7.876cm" svg:y="5.164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985cm" svg:height="0.352cm" svg:x="2.59cm" svg:y="6.264cm">
          <draw:text-box>
            <text:p text:style-name="P1"><text:span text:style-name="T4">Project Name</text:span></text:p>
          </draw:text-box>
        </draw:frame>
        <draw:frame draw:style-name="gr2" draw:text-style-name="P3" draw:layer="layout" svg:width="0.387cm" svg:height="0.39cm" svg:x="4.581cm" svg:y="6.237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0.097cm" svg:height="0.352cm" svg:x="7.876cm" svg:y="5.967cm">
          <draw:text-box>
            <text:p text:style-name="P1"><text:span text:style-name="T5">Food Ordering </text:span><text:span text:style-name="T5">Behaviour &amp; </text:span><text:span text:style-name="T5">Customer Trends: </text:span><text:span text:style-name="T5">A Structured </text:span><text:span text:style-name="T5">Analysis of </text:span></text:p>
          </draw:text-box>
        </draw:frame>
        <draw:frame draw:style-name="gr4" draw:text-style-name="P5" draw:layer="layout" svg:width="2.705cm" svg:height="0.352cm" svg:x="7.876cm" svg:y="6.433cm">
          <draw:text-box>
            <text:p text:style-name="P1"><text:span text:style-name="T5">Choices and Habits</text:span></text:p>
          </draw:text-box>
        </draw:frame>
        <draw:polygon draw:style-name="gr5" draw:text-style-name="P6" draw:layer="layout" svg:width="0.021cm" svg:height="0.163cm" svg:x="2.562cm" svg:y="5.737cm" svg:viewBox="0 0 22 164" draw:points="0,0 22,0 22,164 0,164">
          <text:p/>
        </draw:polygon>
        <draw:polygon draw:style-name="gr5" draw:text-style-name="P6" draw:layer="layout" svg:width="5.265cm" svg:height="0.021cm" svg:x="2.583cm" svg:y="5.737cm" svg:viewBox="0 0 5266 22" draw:points="0,0 5266,0 5266,22 0,22">
          <text:p/>
        </draw:polygon>
        <draw:polygon draw:style-name="gr5" draw:text-style-name="P6" draw:layer="layout" svg:width="0.021cm" svg:height="0.163cm" svg:x="7.848cm" svg:y="5.737cm" svg:viewBox="0 0 22 164" draw:points="0,0 22,0 22,164 0,164">
          <text:p/>
        </draw:polygon>
        <draw:polygon draw:style-name="gr5" draw:text-style-name="P6" draw:layer="layout" svg:width="10.573cm" svg:height="0.021cm" svg:x="7.869cm" svg:y="5.737cm" svg:viewBox="0 0 10574 22" draw:points="0,0 10574,0 10574,22 0,22">
          <text:p/>
        </draw:polygon>
        <draw:polygon draw:style-name="gr5" draw:text-style-name="P6" draw:layer="layout" svg:width="0.021cm" svg:height="0.163cm" svg:x="18.442cm" svg:y="5.737cm" svg:viewBox="0 0 22 164" draw:points="0,0 22,0 22,164 0,164">
          <text:p/>
        </draw:polygon>
        <draw:polygon draw:style-name="gr5" draw:text-style-name="P6" draw:layer="layout" svg:width="0.021cm" svg:height="1.044cm" svg:x="2.562cm" svg:y="5.9cm" svg:viewBox="0 0 22 1045" draw:points="0,0 22,0 22,1045 0,1045">
          <text:p/>
        </draw:polygon>
        <draw:polygon draw:style-name="gr5" draw:text-style-name="P6" draw:layer="layout" svg:width="0.021cm" svg:height="1.044cm" svg:x="7.848cm" svg:y="5.9cm" svg:viewBox="0 0 22 1045" draw:points="0,0 22,0 22,1045 0,1045">
          <text:p/>
        </draw:polygon>
        <draw:polygon draw:style-name="gr5" draw:text-style-name="P6" draw:layer="layout" svg:width="0.021cm" svg:height="1.044cm" svg:x="18.442cm" svg:y="5.9cm" svg:viewBox="0 0 22 1045" draw:points="0,0 22,0 22,1045 0,1045">
          <text:p/>
        </draw:polygon>
        <draw:frame draw:style-name="gr2" draw:text-style-name="P3" draw:layer="layout" svg:width="0.387cm" svg:height="0.39cm" svg:x="10.594cm" svg:y="6.406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2.484cm" svg:height="0.352cm" svg:x="2.59cm" svg:y="7.181cm">
          <draw:text-box>
            <text:p text:style-name="P1"><text:span text:style-name="T4">Maxi</text:span><text:span text:style-name="T4">mum </text:span><text:span text:style-name="T4">Marks</text:span></text:p>
          </draw:text-box>
        </draw:frame>
        <draw:frame draw:style-name="gr2" draw:text-style-name="P3" draw:layer="layout" svg:width="0.387cm" svg:height="0.39cm" svg:x="5.075cm" svg:y="7.154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148cm" svg:height="0.352cm" svg:x="7.876cm" svg:y="7.181cm">
          <draw:text-box>
            <text:p text:style-name="P1"><text:span text:style-name="T5">4 </text:span><text:span text:style-name="T5">Mark</text:span><text:span text:style-name="T5">s</text:span></text:p>
          </draw:text-box>
        </draw:frame>
        <draw:polygon draw:style-name="gr5" draw:text-style-name="P6" draw:layer="layout" svg:width="0.021cm" svg:height="0.162cm" svg:x="2.562cm" svg:y="6.944cm" svg:viewBox="0 0 22 163" draw:points="0,0 22,0 22,163 0,163">
          <text:p/>
        </draw:polygon>
        <draw:polygon draw:style-name="gr5" draw:text-style-name="P6" draw:layer="layout" svg:width="5.265cm" svg:height="0.021cm" svg:x="2.583cm" svg:y="6.944cm" svg:viewBox="0 0 5266 22" draw:points="0,0 5266,0 5266,22 0,22">
          <text:p/>
        </draw:polygon>
        <draw:polygon draw:style-name="gr5" draw:text-style-name="P6" draw:layer="layout" svg:width="0.021cm" svg:height="0.162cm" svg:x="7.848cm" svg:y="6.944cm" svg:viewBox="0 0 22 163" draw:points="0,0 22,0 22,163 0,163">
          <text:p/>
        </draw:polygon>
        <draw:polygon draw:style-name="gr5" draw:text-style-name="P6" draw:layer="layout" svg:width="10.573cm" svg:height="0.021cm" svg:x="7.869cm" svg:y="6.944cm" svg:viewBox="0 0 10574 22" draw:points="0,0 10574,0 10574,22 0,22">
          <text:p/>
        </draw:polygon>
        <draw:polygon draw:style-name="gr5" draw:text-style-name="P6" draw:layer="layout" svg:width="0.021cm" svg:height="0.162cm" svg:x="18.442cm" svg:y="6.944cm" svg:viewBox="0 0 22 163" draw:points="0,0 22,0 22,163 0,163">
          <text:p/>
        </draw:polygon>
        <draw:polygon draw:style-name="gr5" draw:text-style-name="P6" draw:layer="layout" svg:width="0.021cm" svg:height="0.649cm" svg:x="2.562cm" svg:y="7.106cm" svg:viewBox="0 0 22 650" draw:points="0,0 22,0 22,650 0,650">
          <text:p/>
        </draw:polygon>
        <draw:polygon draw:style-name="gr5" draw:text-style-name="P6" draw:layer="layout" svg:width="0.021cm" svg:height="0.021cm" svg:x="2.562cm" svg:y="7.755cm" svg:viewBox="0 0 22 22" draw:points="0,0 22,0 22,22 0,22">
          <text:p/>
        </draw:polygon>
        <draw:polygon draw:style-name="gr5" draw:text-style-name="P6" draw:layer="layout" svg:width="0.021cm" svg:height="0.021cm" svg:x="2.562cm" svg:y="7.755cm" svg:viewBox="0 0 22 22" draw:points="0,0 22,0 22,22 0,22">
          <text:p/>
        </draw:polygon>
        <draw:polygon draw:style-name="gr5" draw:text-style-name="P6" draw:layer="layout" svg:width="5.265cm" svg:height="0.021cm" svg:x="2.583cm" svg:y="7.755cm" svg:viewBox="0 0 5266 22" draw:points="0,0 5266,0 5266,22 0,22">
          <text:p/>
        </draw:polygon>
        <draw:polygon draw:style-name="gr5" draw:text-style-name="P6" draw:layer="layout" svg:width="0.021cm" svg:height="0.649cm" svg:x="7.848cm" svg:y="7.106cm" svg:viewBox="0 0 22 650" draw:points="0,0 22,0 22,650 0,650">
          <text:p/>
        </draw:polygon>
        <draw:polygon draw:style-name="gr5" draw:text-style-name="P6" draw:layer="layout" svg:width="0.021cm" svg:height="0.021cm" svg:x="7.848cm" svg:y="7.755cm" svg:viewBox="0 0 22 22" draw:points="0,0 22,0 22,22 0,22">
          <text:p/>
        </draw:polygon>
        <draw:polygon draw:style-name="gr5" draw:text-style-name="P6" draw:layer="layout" svg:width="10.573cm" svg:height="0.021cm" svg:x="7.869cm" svg:y="7.755cm" svg:viewBox="0 0 10574 22" draw:points="0,0 10574,0 10574,22 0,22">
          <text:p/>
        </draw:polygon>
        <draw:polygon draw:style-name="gr5" draw:text-style-name="P6" draw:layer="layout" svg:width="0.021cm" svg:height="0.649cm" svg:x="18.442cm" svg:y="7.106cm" svg:viewBox="0 0 22 650" draw:points="0,0 22,0 22,650 0,650">
          <text:p/>
        </draw:polygon>
        <draw:polygon draw:style-name="gr5" draw:text-style-name="P6" draw:layer="layout" svg:width="0.021cm" svg:height="0.021cm" svg:x="18.442cm" svg:y="7.755cm" svg:viewBox="0 0 22 22" draw:points="0,0 22,0 22,22 0,22">
          <text:p/>
        </draw:polygon>
        <draw:polygon draw:style-name="gr5" draw:text-style-name="P6" draw:layer="layout" svg:width="0.021cm" svg:height="0.021cm" svg:x="18.442cm" svg:y="7.755cm" svg:viewBox="0 0 22 22" draw:points="0,0 22,0 22,22 0,22">
          <text:p/>
        </draw:polygon>
        <draw:frame draw:style-name="gr2" draw:text-style-name="P3" draw:layer="layout" svg:width="0.387cm" svg:height="0.39cm" svg:x="9.027cm" svg:y="7.154cm">
          <draw:text-box>
            <text:p text:style-name="P1"><text:span text:style-name="T2"><text:s/></text:span></text:p>
          </draw:text-box>
        </draw:frame>
        <draw:frame draw:style-name="gr6" draw:text-style-name="P7" draw:layer="layout" svg:width="13.811cm" svg:height="0.425cm" svg:x="2.922cm" svg:y="7.862cm">
          <draw:text-box>
            <text:p text:style-name="P1"><text:span text:style-name="T6">Solution </text:span><text:span text:style-name="T6">Architec</text:span><text:span text:style-name="T6">ture </text:span><text:span text:style-name="T6">Diagram </text:span><text:span text:style-name="T6">— Food </text:span><text:span text:style-name="T6">Orderin</text:span><text:span text:style-name="T6">g </text:span><text:span text:style-name="T6">Behavio</text:span><text:span text:style-name="T6">ur &amp; </text:span><text:span text:style-name="T6">Custom</text:span><text:span text:style-name="T6">er </text:span><text:span text:style-name="T6">Trends</text:span></text:p>
          </draw:text-box>
        </draw:frame>
        <draw:frame draw:style-name="gr2" draw:text-style-name="P3" draw:layer="layout" svg:width="0.387cm" svg:height="0.39cm" svg:x="16.663cm" svg:y="7.88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7cm" svg:height="0.39cm" svg:x="18.18cm" svg:y="25.375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4.922cm" svg:height="0.352cm" svg:x="3.204cm" svg:y="25.974cm">
          <draw:text-box>
            <text:p text:style-name="P1"><text:span text:style-name="T7">F</text:span><text:span text:style-name="T7">i</text:span><text:span text:style-name="T7">g</text:span><text:span text:style-name="T7">u</text:span><text:span text:style-name="T7">r</text:span><text:span text:style-name="T7">e</text:span><text:span text:style-name="T7"> </text:span><text:span text:style-name="T7">1</text:span><text:span text:style-name="T7">:</text:span><text:span text:style-name="T7"> </text:span><text:span text:style-name="T7">A</text:span><text:span text:style-name="T7">r</text:span><text:span text:style-name="T7">c</text:span><text:span text:style-name="T7">h</text:span><text:span text:style-name="T7">i</text:span><text:span text:style-name="T7">t</text:span><text:span text:style-name="T7">e</text:span><text:span text:style-name="T7">c</text:span><text:span text:style-name="T7">t</text:span><text:span text:style-name="T7">u</text:span><text:span text:style-name="T7">r</text:span><text:span text:style-name="T7">e</text:span><text:span text:style-name="T7"> </text:span><text:span text:style-name="T7">a</text:span><text:span text:style-name="T7">n</text:span><text:span text:style-name="T7">d</text:span><text:span text:style-name="T7"> </text:span><text:span text:style-name="T7">d</text:span><text:span text:style-name="T7">a</text:span><text:span text:style-name="T7">t</text:span><text:span text:style-name="T7">a</text:span><text:span text:style-name="T7"> </text:span><text:span text:style-name="T7">f</text:span><text:span text:style-name="T7">l</text:span><text:span text:style-name="T7">o</text:span><text:span text:style-name="T7">w</text:span><text:span text:style-name="T7"> </text:span><text:span text:style-name="T7">o</text:span><text:span text:style-name="T7">f</text:span><text:span text:style-name="T7"> </text:span><text:span text:style-name="T7">t</text:span><text:span text:style-name="T7">h</text:span><text:span text:style-name="T7">e</text:span><text:span text:style-name="T7"> </text:span><text:span text:style-name="T7">F</text:span><text:span text:style-name="T7">o</text:span><text:span text:style-name="T7">o</text:span><text:span text:style-name="T7">d</text:span><text:span text:style-name="T7"> </text:span><text:span text:style-name="T7">O</text:span><text:span text:style-name="T7">r</text:span><text:span text:style-name="T7">d</text:span><text:span text:style-name="T7">e</text:span><text:span text:style-name="T7">r</text:span><text:span text:style-name="T7">i</text:span><text:span text:style-name="T7">n</text:span><text:span text:style-name="T7">g</text:span><text:span text:style-name="T7"> </text:span><text:span text:style-name="T7">B</text:span><text:span text:style-name="T7">e</text:span><text:span text:style-name="T7">h</text:span><text:span text:style-name="T7">a</text:span><text:span text:style-name="T7">v</text:span><text:span text:style-name="T7">i</text:span><text:span text:style-name="T7">o</text:span><text:span text:style-name="T7">u</text:span><text:span text:style-name="T7">r</text:span><text:span text:style-name="T7"> </text:span><text:span text:style-name="T7">&amp;</text:span><text:span text:style-name="T7"> </text:span><text:span text:style-name="T7">C</text:span><text:span text:style-name="T7">u</text:span><text:span text:style-name="T7">s</text:span><text:span text:style-name="T7">t</text:span><text:span text:style-name="T7">o</text:span><text:span text:style-name="T7">m</text:span><text:span text:style-name="T7">e</text:span><text:span text:style-name="T7">r</text:span><text:span text:style-name="T7"> </text:span><text:span text:style-name="T7">T</text:span><text:span text:style-name="T7">r</text:span><text:span text:style-name="T7">e</text:span><text:span text:style-name="T7">n</text:span><text:span text:style-name="T7">d</text:span><text:span text:style-name="T7">s</text:span><text:span text:style-name="T7"> </text:span><text:span text:style-name="T7">T</text:span><text:span text:style-name="T7">a</text:span><text:span text:style-name="T7">b</text:span><text:span text:style-name="T7">l</text:span><text:span text:style-name="T7">e</text:span><text:span text:style-name="T7">a</text:span><text:span text:style-name="T7">u</text:span><text:span text:style-name="T7"> </text:span><text:span text:style-name="T7">s</text:span><text:span text:style-name="T7">o</text:span><text:span text:style-name="T7">l</text:span><text:span text:style-name="T7">u</text:span><text:span text:style-name="T7">t</text:span><text:span text:style-name="T7">i</text:span><text:span text:style-name="T7">o</text:span><text:span text:style-name="T7">n</text:span></text:p>
          </draw:text-box>
        </draw:frame>
        <draw:frame draw:style-name="gr7" draw:text-style-name="P8" draw:layer="layout" svg:width="15.345cm" svg:height="6.905cm" svg:x="2.828cm" svg:y="18.757cm">
          <draw:image xlink:href="Pictures/10000000000004B80000021FC0F77A4C.jpg" xlink:type="simple" xlink:show="embed" xlink:actuate="onLoad" draw:mime-type="image/jpeg">
            <text:p/>
          </draw:image>
        </draw:frame>
        <draw:polygon draw:style-name="gr8" draw:text-style-name="P9" draw:layer="layout" svg:width="1.213cm" svg:height="0.678cm" svg:x="2.569cm" svg:y="9.378cm" svg:viewBox="0 0 1214 679" draw:points="0,0 1214,0 1214,679 0,679">
          <text:p/>
        </draw:polygon>
        <draw:polygon draw:style-name="gr8" draw:text-style-name="P9" draw:layer="layout" svg:width="1.206cm" svg:height="0.467cm" svg:x="2.576cm" svg:y="9.406cm" svg:viewBox="0 0 1207 468" draw:points="0,0 1207,0 1207,468 0,468">
          <text:p/>
        </draw:polygon>
        <draw:frame draw:style-name="gr2" draw:text-style-name="P3" draw:layer="layout" svg:width="0.387cm" svg:height="0.39cm" svg:x="18.117cm" svg:y="25.948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792cm" svg:height="0.352cm" svg:x="2.724cm" svg:y="9.481cm">
          <draw:text-box>
            <text:p text:style-name="P1"><text:span text:style-name="T4">L</text:span><text:span text:style-name="T4">a</text:span><text:span text:style-name="T4">y</text:span><text:span text:style-name="T4">e</text:span><text:span text:style-name="T4">r</text:span></text:p>
          </draw:text-box>
        </draw:frame>
        <draw:polygon draw:style-name="gr8" draw:text-style-name="P9" draw:layer="layout" svg:width="3.508cm" svg:height="0.678cm" svg:x="3.804cm" svg:y="9.378cm" svg:viewBox="0 0 3509 679" draw:points="0,0 3509,0 3509,679 0,679">
          <text:p/>
        </draw:polygon>
        <draw:polygon draw:style-name="gr8" draw:text-style-name="P9" draw:layer="layout" svg:width="3.502cm" svg:height="0.467cm" svg:x="3.81cm" svg:y="9.406cm" svg:viewBox="0 0 3503 468" draw:points="0,0 3503,0 3503,468 0,468">
          <text:p/>
        </draw:polygon>
        <draw:frame draw:style-name="gr2" draw:text-style-name="P3" draw:layer="layout" svg:width="0.387cm" svg:height="0.39cm" svg:x="3.507cm" svg:y="9.454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716cm" svg:height="0.352cm" svg:x="4.701cm" svg:y="9.481cm">
          <draw:text-box>
            <text:p text:style-name="P1"><text:span text:style-name="T4">Com</text:span><text:span text:style-name="T4">pon</text:span><text:span text:style-name="T4">ent</text:span></text:p>
          </draw:text-box>
        </draw:frame>
        <draw:polygon draw:style-name="gr8" draw:text-style-name="P9" draw:layer="layout" svg:width="7.565cm" svg:height="0.678cm" svg:x="7.333cm" svg:y="9.378cm" svg:viewBox="0 0 7566 679" draw:points="0,0 7566,0 7566,679 0,679">
          <text:p/>
        </draw:polygon>
        <draw:polygon draw:style-name="gr8" draw:text-style-name="P9" draw:layer="layout" svg:width="7.558cm" svg:height="0.467cm" svg:x="7.34cm" svg:y="9.406cm" svg:viewBox="0 0 7559 468" draw:points="0,0 7559,0 7559,468 0,468">
          <text:p/>
        </draw:polygon>
        <draw:frame draw:style-name="gr2" draw:text-style-name="P3" draw:layer="layout" svg:width="0.387cm" svg:height="0.39cm" svg:x="6.415cm" svg:y="9.454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652cm" svg:height="0.352cm" svg:x="10.791cm" svg:y="9.481cm">
          <draw:text-box>
            <text:p text:style-name="P1"><text:span text:style-name="T4">Role</text:span></text:p>
          </draw:text-box>
        </draw:frame>
        <draw:polygon draw:style-name="gr8" draw:text-style-name="P9" draw:layer="layout" svg:width="3.522cm" svg:height="0.678cm" svg:x="14.92cm" svg:y="9.378cm" svg:viewBox="0 0 3523 679" draw:points="0,0 3523,0 3523,679 0,679">
          <text:p/>
        </draw:polygon>
        <draw:polygon draw:style-name="gr8" draw:text-style-name="P9" draw:layer="layout" svg:width="3.501cm" svg:height="0.467cm" svg:x="14.927cm" svg:y="9.406cm" svg:viewBox="0 0 3502 468" draw:points="0,0 3502,0 3502,468 0,468">
          <text:p/>
        </draw:polygon>
        <draw:frame draw:style-name="gr2" draw:text-style-name="P3" draw:layer="layout" svg:width="0.387cm" svg:height="0.39cm" svg:x="11.441cm" svg:y="9.454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674cm" svg:height="0.352cm" svg:x="15.845cm" svg:y="9.481cm">
          <draw:text-box>
            <text:p text:style-name="P1"><text:span text:style-name="T4">T</text:span><text:span text:style-name="T4">e</text:span><text:span text:style-name="T4">c</text:span><text:span text:style-name="T4">h</text:span><text:span text:style-name="T4">n</text:span><text:span text:style-name="T4">o</text:span><text:span text:style-name="T4">l</text:span><text:span text:style-name="T4">o</text:span><text:span text:style-name="T4">g</text:span><text:span text:style-name="T4">y</text:span></text:p>
          </draw:text-box>
        </draw:frame>
        <draw:polygon draw:style-name="gr9" draw:text-style-name="P10" draw:layer="layout" svg:width="0.022cm" svg:height="0.056cm" svg:x="2.547cm" svg:y="9.357cm" svg:viewBox="0 0 23 57" draw:points="0,0 23,0 23,57 0,57">
          <text:p/>
        </draw:polygon>
        <draw:polygon draw:style-name="gr9" draw:text-style-name="P10" draw:layer="layout" svg:width="0.022cm" svg:height="0.021cm" svg:x="2.547cm" svg:y="9.357cm" svg:viewBox="0 0 23 22" draw:points="0,0 23,0 23,22 0,22">
          <text:p/>
        </draw:polygon>
        <draw:polygon draw:style-name="gr9" draw:text-style-name="P10" draw:layer="layout" svg:width="1.213cm" svg:height="0.021cm" svg:x="2.569cm" svg:y="9.357cm" svg:viewBox="0 0 1214 22" draw:points="0,0 1214,0 1214,22 0,22">
          <text:p/>
        </draw:polygon>
        <draw:polygon draw:style-name="gr8" draw:text-style-name="P9" draw:layer="layout" svg:width="1.213cm" svg:height="0.035cm" svg:x="2.569cm" svg:y="9.378cm" svg:viewBox="0 0 1214 36" draw:points="0,0 1214,0 1214,36 0,36">
          <text:p/>
        </draw:polygon>
        <draw:polygon draw:style-name="gr9" draw:text-style-name="P10" draw:layer="layout" svg:width="0.021cm" svg:height="0.035cm" svg:x="3.782cm" svg:y="9.378cm" svg:viewBox="0 0 22 36" draw:points="0,0 22,0 22,36 0,36">
          <text:p/>
        </draw:polygon>
        <draw:polygon draw:style-name="gr9" draw:text-style-name="P10" draw:layer="layout" svg:width="0.021cm" svg:height="0.021cm" svg:x="3.782cm" svg:y="9.357cm" svg:viewBox="0 0 22 22" draw:points="0,0 22,0 22,22 0,22">
          <text:p/>
        </draw:polygon>
        <draw:polygon draw:style-name="gr9" draw:text-style-name="P10" draw:layer="layout" svg:width="3.508cm" svg:height="0.021cm" svg:x="3.804cm" svg:y="9.357cm" svg:viewBox="0 0 3509 22" draw:points="0,0 3509,0 3509,22 0,22">
          <text:p/>
        </draw:polygon>
        <draw:polygon draw:style-name="gr8" draw:text-style-name="P9" draw:layer="layout" svg:width="3.508cm" svg:height="0.035cm" svg:x="3.804cm" svg:y="9.378cm" svg:viewBox="0 0 3509 36" draw:points="0,0 3509,0 3509,36 0,36">
          <text:p/>
        </draw:polygon>
        <draw:polygon draw:style-name="gr9" draw:text-style-name="P10" draw:layer="layout" svg:width="0.021cm" svg:height="0.035cm" svg:x="7.312cm" svg:y="9.378cm" svg:viewBox="0 0 22 36" draw:points="0,0 22,0 22,36 0,36">
          <text:p/>
        </draw:polygon>
        <draw:polygon draw:style-name="gr9" draw:text-style-name="P10" draw:layer="layout" svg:width="0.021cm" svg:height="0.021cm" svg:x="7.312cm" svg:y="9.357cm" svg:viewBox="0 0 22 22" draw:points="0,0 22,0 22,22 0,22">
          <text:p/>
        </draw:polygon>
        <draw:polygon draw:style-name="gr9" draw:text-style-name="P10" draw:layer="layout" svg:width="7.565cm" svg:height="0.021cm" svg:x="7.333cm" svg:y="9.357cm" svg:viewBox="0 0 7566 22" draw:points="0,0 7566,0 7566,22 0,22">
          <text:p/>
        </draw:polygon>
        <draw:polygon draw:style-name="gr8" draw:text-style-name="P9" draw:layer="layout" svg:width="7.565cm" svg:height="0.035cm" svg:x="7.333cm" svg:y="9.378cm" svg:viewBox="0 0 7566 36" draw:points="0,0 7566,0 7566,36 0,36">
          <text:p/>
        </draw:polygon>
        <draw:polygon draw:style-name="gr9" draw:text-style-name="P10" draw:layer="layout" svg:width="0.022cm" svg:height="0.035cm" svg:x="14.898cm" svg:y="9.378cm" svg:viewBox="0 0 23 36" draw:points="0,0 23,0 23,36 0,36">
          <text:p/>
        </draw:polygon>
        <draw:polygon draw:style-name="gr9" draw:text-style-name="P10" draw:layer="layout" svg:width="0.022cm" svg:height="0.021cm" svg:x="14.898cm" svg:y="9.357cm" svg:viewBox="0 0 23 22" draw:points="0,0 23,0 23,22 0,22">
          <text:p/>
        </draw:polygon>
        <draw:polygon draw:style-name="gr9" draw:text-style-name="P10" draw:layer="layout" svg:width="3.522cm" svg:height="0.021cm" svg:x="14.92cm" svg:y="9.357cm" svg:viewBox="0 0 3523 22" draw:points="0,0 3523,0 3523,22 0,22">
          <text:p/>
        </draw:polygon>
        <draw:polygon draw:style-name="gr8" draw:text-style-name="P9" draw:layer="layout" svg:width="3.522cm" svg:height="0.035cm" svg:x="14.92cm" svg:y="9.378cm" svg:viewBox="0 0 3523 36" draw:points="0,0 3523,0 3523,36 0,36">
          <text:p/>
        </draw:polygon>
        <draw:polygon draw:style-name="gr9" draw:text-style-name="P10" draw:layer="layout" svg:width="0.022cm" svg:height="0.642cm" svg:x="2.547cm" svg:y="9.414cm" svg:viewBox="0 0 23 643" draw:points="0,0 23,0 23,643 0,643">
          <text:p/>
        </draw:polygon>
        <draw:polygon draw:style-name="gr9" draw:text-style-name="P10" draw:layer="layout" svg:width="0.021cm" svg:height="0.642cm" svg:x="3.782cm" svg:y="9.414cm" svg:viewBox="0 0 22 643" draw:points="0,0 22,0 22,643 0,643">
          <text:p/>
        </draw:polygon>
        <draw:polygon draw:style-name="gr9" draw:text-style-name="P10" draw:layer="layout" svg:width="0.021cm" svg:height="0.642cm" svg:x="7.312cm" svg:y="9.414cm" svg:viewBox="0 0 22 643" draw:points="0,0 22,0 22,643 0,643">
          <text:p/>
        </draw:polygon>
        <draw:polygon draw:style-name="gr9" draw:text-style-name="P10" draw:layer="layout" svg:width="0.022cm" svg:height="0.642cm" svg:x="14.898cm" svg:y="9.414cm" svg:viewBox="0 0 23 643" draw:points="0,0 23,0 23,643 0,643">
          <text:p/>
        </draw:polygon>
        <draw:frame draw:style-name="gr2" draw:text-style-name="P3" draw:layer="layout" svg:width="0.387cm" svg:height="0.39cm" svg:x="17.496cm" svg:y="9.454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05cm" svg:height="0.352cm" svg:x="2.597cm" svg:y="10.187cm">
          <draw:text-box>
            <text:p text:style-name="P1"><text:span text:style-name="T4">Layer 1</text:span></text:p>
          </draw:text-box>
        </draw:frame>
        <draw:frame draw:style-name="gr2" draw:text-style-name="P3" draw:layer="layout" svg:width="0.387cm" svg:height="0.39cm" svg:x="3.641cm" svg:y="10.161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764cm" svg:height="0.352cm" svg:x="3.811cm" svg:y="10.187cm">
          <draw:text-box>
            <text:p text:style-name="P1"><text:span text:style-name="T4">Data Source</text:span></text:p>
          </draw:text-box>
        </draw:frame>
        <draw:frame draw:style-name="gr2" draw:text-style-name="P3" draw:layer="layout" svg:width="0.387cm" svg:height="0.39cm" svg:x="5.569cm" svg:y="10.161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2.715cm" svg:height="0.352cm" svg:x="7.341cm" svg:y="10.187cm">
          <draw:text-box>
            <text:p text:style-name="P1"><text:span text:style-name="T5">The 50,000-record </text:span></text:p>
          </draw:text-box>
        </draw:frame>
        <draw:frame draw:style-name="gr2" draw:text-style-name="P3" draw:layer="layout" svg:width="0.387cm" svg:height="0.39cm" svg:x="10.051cm" svg:y="10.161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7.287cm" svg:height="0.352cm" svg:x="7.341cm" svg:y="10.646cm">
          <draw:text-box>
            <text:p text:style-name="P1"><text:span text:style-name="T5">food_ordering_behavior_dataset.csv single source </text:span></text:p>
          </draw:text-box>
        </draw:frame>
        <draw:frame draw:style-name="gr4" draw:text-style-name="P5" draw:layer="layout" svg:width="3.348cm" svg:height="0.352cm" svg:x="7.341cm" svg:y="11.112cm">
          <draw:text-box>
            <text:p text:style-name="P1"><text:span text:style-name="T5">of truth for the analysis</text:span></text:p>
          </draw:text-box>
        </draw:frame>
        <draw:frame draw:style-name="gr2" draw:text-style-name="P3" draw:layer="layout" svg:width="0.387cm" svg:height="0.39cm" svg:x="10.693cm" svg:y="11.085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2.328cm" svg:height="0.352cm" svg:x="14.927cm" svg:y="10.187cm">
          <draw:text-box>
            <text:p text:style-name="P1"><text:span text:style-name="T5">Flat-file CSV (19 </text:span></text:p>
          </draw:text-box>
        </draw:frame>
        <draw:frame draw:style-name="gr4" draw:text-style-name="P5" draw:layer="layout" svg:width="1.31cm" svg:height="0.352cm" svg:x="14.927cm" svg:y="10.646cm">
          <draw:text-box>
            <text:p text:style-name="P1"><text:span text:style-name="T5">columns)</text:span></text:p>
          </draw:text-box>
        </draw:frame>
        <draw:polygon draw:style-name="gr10" draw:text-style-name="P11" draw:layer="layout" svg:width="0.022cm" svg:height="0.057cm" svg:x="2.547cm" svg:y="10.056cm" svg:viewBox="0 0 23 58" draw:points="0,0 23,0 23,58 0,58">
          <text:p/>
        </draw:polygon>
        <draw:polygon draw:style-name="gr10" draw:text-style-name="P11" draw:layer="layout" svg:width="1.213cm" svg:height="0.021cm" svg:x="2.569cm" svg:y="10.056cm" svg:viewBox="0 0 1214 22" draw:points="0,0 1214,0 1214,22 0,22">
          <text:p/>
        </draw:polygon>
        <draw:polygon draw:style-name="gr10" draw:text-style-name="P11" draw:layer="layout" svg:width="0.021cm" svg:height="0.057cm" svg:x="3.782cm" svg:y="10.056cm" svg:viewBox="0 0 22 58" draw:points="0,0 22,0 22,58 0,58">
          <text:p/>
        </draw:polygon>
        <draw:polygon draw:style-name="gr10" draw:text-style-name="P11" draw:layer="layout" svg:width="3.508cm" svg:height="0.021cm" svg:x="3.804cm" svg:y="10.056cm" svg:viewBox="0 0 3509 22" draw:points="0,0 3509,0 3509,22 0,22">
          <text:p/>
        </draw:polygon>
        <draw:polygon draw:style-name="gr10" draw:text-style-name="P11" draw:layer="layout" svg:width="0.021cm" svg:height="0.057cm" svg:x="7.312cm" svg:y="10.056cm" svg:viewBox="0 0 22 58" draw:points="0,0 22,0 22,58 0,58">
          <text:p/>
        </draw:polygon>
        <draw:polygon draw:style-name="gr10" draw:text-style-name="P11" draw:layer="layout" svg:width="7.565cm" svg:height="0.021cm" svg:x="7.333cm" svg:y="10.056cm" svg:viewBox="0 0 7566 22" draw:points="0,0 7566,0 7566,22 0,22">
          <text:p/>
        </draw:polygon>
        <draw:polygon draw:style-name="gr10" draw:text-style-name="P11" draw:layer="layout" svg:width="0.022cm" svg:height="0.057cm" svg:x="14.898cm" svg:y="10.056cm" svg:viewBox="0 0 23 58" draw:points="0,0 23,0 23,58 0,58">
          <text:p/>
        </draw:polygon>
        <draw:polygon draw:style-name="gr10" draw:text-style-name="P11" draw:layer="layout" svg:width="3.508cm" svg:height="0.021cm" svg:x="14.92cm" svg:y="10.056cm" svg:viewBox="0 0 3509 22" draw:points="0,0 3509,0 3509,22 0,22">
          <text:p/>
        </draw:polygon>
        <draw:polygon draw:style-name="gr10" draw:text-style-name="P11" draw:layer="layout" svg:width="0.021cm" svg:height="0.036cm" svg:x="18.428cm" svg:y="10.077cm" svg:viewBox="0 0 22 37" draw:points="0,0 22,0 22,37 0,37">
          <text:p/>
        </draw:polygon>
        <draw:polygon draw:style-name="gr10" draw:text-style-name="P11" draw:layer="layout" svg:width="0.021cm" svg:height="0.021cm" svg:x="18.428cm" svg:y="10.056cm" svg:viewBox="0 0 22 22" draw:points="0,0 22,0 22,22 0,22">
          <text:p/>
        </draw:polygon>
        <draw:polygon draw:style-name="gr10" draw:text-style-name="P11" draw:layer="layout" svg:width="0.022cm" svg:height="1.46cm" svg:x="2.547cm" svg:y="10.113cm" svg:viewBox="0 0 23 1461" draw:points="0,0 23,0 23,1461 0,1461">
          <text:p/>
        </draw:polygon>
        <draw:polygon draw:style-name="gr10" draw:text-style-name="P11" draw:layer="layout" svg:width="0.021cm" svg:height="1.46cm" svg:x="3.782cm" svg:y="10.113cm" svg:viewBox="0 0 22 1461" draw:points="0,0 22,0 22,1461 0,1461">
          <text:p/>
        </draw:polygon>
        <draw:polygon draw:style-name="gr10" draw:text-style-name="P11" draw:layer="layout" svg:width="0.021cm" svg:height="1.46cm" svg:x="7.312cm" svg:y="10.113cm" svg:viewBox="0 0 22 1461" draw:points="0,0 22,0 22,1461 0,1461">
          <text:p/>
        </draw:polygon>
        <draw:polygon draw:style-name="gr10" draw:text-style-name="P11" draw:layer="layout" svg:width="0.022cm" svg:height="1.46cm" svg:x="14.898cm" svg:y="10.113cm" svg:viewBox="0 0 23 1461" draw:points="0,0 23,0 23,1461 0,1461">
          <text:p/>
        </draw:polygon>
        <draw:polygon draw:style-name="gr10" draw:text-style-name="P11" draw:layer="layout" svg:width="0.021cm" svg:height="1.46cm" svg:x="18.428cm" svg:y="10.113cm" svg:viewBox="0 0 22 1461" draw:points="0,0 22,0 22,1461 0,1461">
          <text:p/>
        </draw:polygon>
        <draw:frame draw:style-name="gr2" draw:text-style-name="P3" draw:layer="layout" svg:width="0.387cm" svg:height="0.39cm" svg:x="16.24cm" svg:y="10.619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05cm" svg:height="0.352cm" svg:x="2.597cm" svg:y="11.704cm">
          <draw:text-box>
            <text:p text:style-name="P1"><text:span text:style-name="T4">Layer 2</text:span></text:p>
          </draw:text-box>
        </draw:frame>
        <draw:frame draw:style-name="gr2" draw:text-style-name="P3" draw:layer="layout" svg:width="0.387cm" svg:height="0.39cm" svg:x="3.641cm" svg:y="11.678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2.504cm" svg:height="0.352cm" svg:x="3.811cm" svg:y="11.704cm">
          <draw:text-box>
            <text:p text:style-name="P1"><text:span text:style-name="T4">Data Preparation</text:span></text:p>
          </draw:text-box>
        </draw:frame>
        <draw:frame draw:style-name="gr2" draw:text-style-name="P3" draw:layer="layout" svg:width="0.387cm" svg:height="0.39cm" svg:x="6.302cm" svg:y="11.678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7.442cm" svg:height="0.352cm" svg:x="7.341cm" svg:y="11.704cm">
          <draw:text-box>
            <text:p text:style-name="P1"><text:span text:style-name="T5">Cleaning, type casting and creation of derived fields </text:span></text:p>
          </draw:text-box>
        </draw:frame>
        <draw:frame draw:style-name="gr2" draw:text-style-name="P3" draw:layer="layout" svg:width="0.387cm" svg:height="0.39cm" svg:x="14.8cm" svg:y="11.678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6.168cm" svg:height="0.352cm" svg:x="7.341cm" svg:y="12.17cm">
          <draw:text-box>
            <text:p text:style-name="P1"><text:span text:style-name="T5">(age group, revenue, repeat-order flag) for </text:span></text:p>
          </draw:text-box>
        </draw:frame>
        <draw:frame draw:style-name="gr4" draw:text-style-name="P5" draw:layer="layout" svg:width="1.661cm" svg:height="0.352cm" svg:x="7.341cm" svg:y="12.629cm">
          <draw:text-box>
            <text:p text:style-name="P1"><text:span text:style-name="T5">consistency</text:span></text:p>
          </draw:text-box>
        </draw:frame>
        <draw:frame draw:style-name="gr2" draw:text-style-name="P3" draw:layer="layout" svg:width="0.387cm" svg:height="0.39cm" svg:x="8.999cm" svg:y="12.602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2.922cm" svg:height="0.352cm" svg:x="14.927cm" svg:y="11.704cm">
          <draw:text-box>
            <text:p text:style-name="P1"><text:span text:style-name="T5">Tableau Data Prep / </text:span></text:p>
          </draw:text-box>
        </draw:frame>
        <draw:frame draw:style-name="gr4" draw:text-style-name="P5" draw:layer="layout" svg:width="0.73cm" svg:height="0.352cm" svg:x="14.927cm" svg:y="12.17cm">
          <draw:text-box>
            <text:p text:style-name="P1"><text:span text:style-name="T5">Excel</text:span></text:p>
          </draw:text-box>
        </draw:frame>
        <draw:polygon draw:style-name="gr10" draw:text-style-name="P11" draw:layer="layout" svg:width="0.022cm" svg:height="0.057cm" svg:x="2.547cm" svg:y="11.573cm" svg:viewBox="0 0 23 58" draw:points="0,0 23,0 23,58 0,58">
          <text:p/>
        </draw:polygon>
        <draw:polygon draw:style-name="gr10" draw:text-style-name="P11" draw:layer="layout" svg:width="1.213cm" svg:height="0.021cm" svg:x="2.569cm" svg:y="11.573cm" svg:viewBox="0 0 1214 22" draw:points="0,0 1214,0 1214,22 0,22">
          <text:p/>
        </draw:polygon>
        <draw:polygon draw:style-name="gr10" draw:text-style-name="P11" draw:layer="layout" svg:width="0.021cm" svg:height="0.057cm" svg:x="3.782cm" svg:y="11.573cm" svg:viewBox="0 0 22 58" draw:points="0,0 22,0 22,58 0,58">
          <text:p/>
        </draw:polygon>
        <draw:polygon draw:style-name="gr10" draw:text-style-name="P11" draw:layer="layout" svg:width="3.508cm" svg:height="0.021cm" svg:x="3.804cm" svg:y="11.573cm" svg:viewBox="0 0 3509 22" draw:points="0,0 3509,0 3509,22 0,22">
          <text:p/>
        </draw:polygon>
        <draw:polygon draw:style-name="gr10" draw:text-style-name="P11" draw:layer="layout" svg:width="0.021cm" svg:height="0.057cm" svg:x="7.312cm" svg:y="11.573cm" svg:viewBox="0 0 22 58" draw:points="0,0 22,0 22,58 0,58">
          <text:p/>
        </draw:polygon>
        <draw:polygon draw:style-name="gr10" draw:text-style-name="P11" draw:layer="layout" svg:width="7.565cm" svg:height="0.021cm" svg:x="7.333cm" svg:y="11.573cm" svg:viewBox="0 0 7566 22" draw:points="0,0 7566,0 7566,22 0,22">
          <text:p/>
        </draw:polygon>
        <draw:polygon draw:style-name="gr10" draw:text-style-name="P11" draw:layer="layout" svg:width="0.022cm" svg:height="0.057cm" svg:x="14.898cm" svg:y="11.573cm" svg:viewBox="0 0 23 58" draw:points="0,0 23,0 23,58 0,58">
          <text:p/>
        </draw:polygon>
        <draw:polygon draw:style-name="gr10" draw:text-style-name="P11" draw:layer="layout" svg:width="3.508cm" svg:height="0.021cm" svg:x="14.92cm" svg:y="11.573cm" svg:viewBox="0 0 3509 22" draw:points="0,0 3509,0 3509,22 0,22">
          <text:p/>
        </draw:polygon>
        <draw:polygon draw:style-name="gr10" draw:text-style-name="P11" draw:layer="layout" svg:width="0.021cm" svg:height="0.057cm" svg:x="18.428cm" svg:y="11.573cm" svg:viewBox="0 0 22 58" draw:points="0,0 22,0 22,58 0,58">
          <text:p/>
        </draw:polygon>
        <draw:polygon draw:style-name="gr10" draw:text-style-name="P11" draw:layer="layout" svg:width="0.022cm" svg:height="1.46cm" svg:x="2.547cm" svg:y="11.63cm" svg:viewBox="0 0 23 1461" draw:points="0,0 23,0 23,1461 0,1461">
          <text:p/>
        </draw:polygon>
        <draw:polygon draw:style-name="gr10" draw:text-style-name="P11" draw:layer="layout" svg:width="0.021cm" svg:height="1.46cm" svg:x="3.782cm" svg:y="11.63cm" svg:viewBox="0 0 22 1461" draw:points="0,0 22,0 22,1461 0,1461">
          <text:p/>
        </draw:polygon>
        <draw:polygon draw:style-name="gr10" draw:text-style-name="P11" draw:layer="layout" svg:width="0.021cm" svg:height="1.46cm" svg:x="7.312cm" svg:y="11.63cm" svg:viewBox="0 0 22 1461" draw:points="0,0 22,0 22,1461 0,1461">
          <text:p/>
        </draw:polygon>
        <draw:polygon draw:style-name="gr10" draw:text-style-name="P11" draw:layer="layout" svg:width="0.022cm" svg:height="1.46cm" svg:x="14.898cm" svg:y="11.63cm" svg:viewBox="0 0 23 1461" draw:points="0,0 23,0 23,1461 0,1461">
          <text:p/>
        </draw:polygon>
        <draw:polygon draw:style-name="gr10" draw:text-style-name="P11" draw:layer="layout" svg:width="0.021cm" svg:height="1.46cm" svg:x="18.428cm" svg:y="11.63cm" svg:viewBox="0 0 22 1461" draw:points="0,0 22,0 22,1461 0,1461">
          <text:p/>
        </draw:polygon>
        <draw:frame draw:style-name="gr2" draw:text-style-name="P3" draw:layer="layout" svg:width="0.387cm" svg:height="0.39cm" svg:x="15.647cm" svg:y="12.143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05cm" svg:height="0.352cm" svg:x="2.597cm" svg:y="13.214cm">
          <draw:text-box>
            <text:p text:style-name="P1"><text:span text:style-name="T4">Layer 3</text:span></text:p>
          </draw:text-box>
        </draw:frame>
        <draw:frame draw:style-name="gr2" draw:text-style-name="P3" draw:layer="layout" svg:width="0.387cm" svg:height="0.39cm" svg:x="3.641cm" svg:y="13.188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2.991cm" svg:height="0.352cm" svg:x="3.811cm" svg:y="13.214cm">
          <draw:text-box>
            <text:p text:style-name="P1"><text:span text:style-name="T4">Tableau Data Engine</text:span></text:p>
          </draw:text-box>
        </draw:frame>
        <draw:frame draw:style-name="gr2" draw:text-style-name="P3" draw:layer="layout" svg:width="0.387cm" svg:height="0.39cm" svg:x="6.782cm" svg:y="13.188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7.282cm" svg:height="0.352cm" svg:x="7.341cm" svg:y="13.214cm">
          <draw:text-box>
            <text:p text:style-name="P1"><text:span text:style-name="T5">Cleaned data loaded into Hyper Extract (.hyper) — </text:span></text:p>
          </draw:text-box>
        </draw:frame>
        <draw:frame draw:style-name="gr4" draw:text-style-name="P5" draw:layer="layout" svg:width="6.814cm" svg:height="0.352cm" svg:x="7.341cm" svg:y="13.681cm">
          <draw:text-box>
            <text:p text:style-name="P1"><text:span text:style-name="T5">keeps dashboard responsive at full data volume</text:span></text:p>
          </draw:text-box>
        </draw:frame>
        <draw:frame draw:style-name="gr2" draw:text-style-name="P3" draw:layer="layout" svg:width="0.387cm" svg:height="0.39cm" svg:x="14.144cm" svg:y="13.654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3.231cm" svg:height="0.352cm" svg:x="14.927cm" svg:y="13.214cm">
          <draw:text-box>
            <text:p text:style-name="P1"><text:span text:style-name="T5">Tableau Hyper Extract </text:span></text:p>
          </draw:text-box>
        </draw:frame>
        <draw:frame draw:style-name="gr4" draw:text-style-name="P5" draw:layer="layout" svg:width="1.129cm" svg:height="0.352cm" svg:x="14.927cm" svg:y="13.681cm">
          <draw:text-box>
            <text:p text:style-name="P1"><text:span text:style-name="T5">(.hyper)</text:span></text:p>
          </draw:text-box>
        </draw:frame>
        <draw:polygon draw:style-name="gr10" draw:text-style-name="P11" draw:layer="layout" svg:width="0.022cm" svg:height="0.057cm" svg:x="2.547cm" svg:y="13.09cm" svg:viewBox="0 0 23 58" draw:points="0,0 23,0 23,58 0,58">
          <text:p/>
        </draw:polygon>
        <draw:polygon draw:style-name="gr10" draw:text-style-name="P11" draw:layer="layout" svg:width="1.213cm" svg:height="0.022cm" svg:x="2.569cm" svg:y="13.09cm" svg:viewBox="0 0 1214 23" draw:points="0,0 1214,0 1214,23 0,23">
          <text:p/>
        </draw:polygon>
        <draw:polygon draw:style-name="gr10" draw:text-style-name="P11" draw:layer="layout" svg:width="0.021cm" svg:height="0.057cm" svg:x="3.782cm" svg:y="13.09cm" svg:viewBox="0 0 22 58" draw:points="0,0 22,0 22,58 0,58">
          <text:p/>
        </draw:polygon>
        <draw:polygon draw:style-name="gr10" draw:text-style-name="P11" draw:layer="layout" svg:width="3.508cm" svg:height="0.022cm" svg:x="3.804cm" svg:y="13.09cm" svg:viewBox="0 0 3509 23" draw:points="0,0 3509,0 3509,23 0,23">
          <text:p/>
        </draw:polygon>
        <draw:polygon draw:style-name="gr10" draw:text-style-name="P11" draw:layer="layout" svg:width="0.021cm" svg:height="0.057cm" svg:x="7.312cm" svg:y="13.09cm" svg:viewBox="0 0 22 58" draw:points="0,0 22,0 22,58 0,58">
          <text:p/>
        </draw:polygon>
        <draw:polygon draw:style-name="gr10" draw:text-style-name="P11" draw:layer="layout" svg:width="7.565cm" svg:height="0.022cm" svg:x="7.333cm" svg:y="13.09cm" svg:viewBox="0 0 7566 23" draw:points="0,0 7566,0 7566,23 0,23">
          <text:p/>
        </draw:polygon>
        <draw:polygon draw:style-name="gr10" draw:text-style-name="P11" draw:layer="layout" svg:width="0.022cm" svg:height="0.057cm" svg:x="14.898cm" svg:y="13.09cm" svg:viewBox="0 0 23 58" draw:points="0,0 23,0 23,58 0,58">
          <text:p/>
        </draw:polygon>
        <draw:polygon draw:style-name="gr10" draw:text-style-name="P11" draw:layer="layout" svg:width="3.508cm" svg:height="0.022cm" svg:x="14.92cm" svg:y="13.09cm" svg:viewBox="0 0 3509 23" draw:points="0,0 3509,0 3509,23 0,23">
          <text:p/>
        </draw:polygon>
        <draw:polygon draw:style-name="gr10" draw:text-style-name="P11" draw:layer="layout" svg:width="0.021cm" svg:height="0.057cm" svg:x="18.428cm" svg:y="13.09cm" svg:viewBox="0 0 22 58" draw:points="0,0 22,0 22,58 0,58">
          <text:p/>
        </draw:polygon>
        <draw:polygon draw:style-name="gr10" draw:text-style-name="P11" draw:layer="layout" svg:width="0.022cm" svg:height="1.045cm" svg:x="2.547cm" svg:y="13.147cm" svg:viewBox="0 0 23 1046" draw:points="0,0 23,0 23,1046 0,1046">
          <text:p/>
        </draw:polygon>
        <draw:polygon draw:style-name="gr10" draw:text-style-name="P11" draw:layer="layout" svg:width="0.021cm" svg:height="1.045cm" svg:x="3.782cm" svg:y="13.147cm" svg:viewBox="0 0 22 1046" draw:points="0,0 22,0 22,1046 0,1046">
          <text:p/>
        </draw:polygon>
        <draw:polygon draw:style-name="gr10" draw:text-style-name="P11" draw:layer="layout" svg:width="0.021cm" svg:height="1.045cm" svg:x="7.312cm" svg:y="13.147cm" svg:viewBox="0 0 22 1046" draw:points="0,0 22,0 22,1046 0,1046">
          <text:p/>
        </draw:polygon>
        <draw:polygon draw:style-name="gr10" draw:text-style-name="P11" draw:layer="layout" svg:width="0.022cm" svg:height="1.045cm" svg:x="14.898cm" svg:y="13.147cm" svg:viewBox="0 0 23 1046" draw:points="0,0 23,0 23,1046 0,1046">
          <text:p/>
        </draw:polygon>
        <draw:polygon draw:style-name="gr10" draw:text-style-name="P11" draw:layer="layout" svg:width="0.021cm" svg:height="1.045cm" svg:x="18.428cm" svg:y="13.147cm" svg:viewBox="0 0 22 1046" draw:points="0,0 22,0 22,1046 0,1046">
          <text:p/>
        </draw:polygon>
        <draw:frame draw:style-name="gr2" draw:text-style-name="P3" draw:layer="layout" svg:width="0.387cm" svg:height="0.39cm" svg:x="16.05cm" svg:y="13.654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05cm" svg:height="0.352cm" svg:x="2.597cm" svg:y="14.323cm">
          <draw:text-box>
            <text:p text:style-name="P1"><text:span text:style-name="T4">Layer 4</text:span></text:p>
          </draw:text-box>
        </draw:frame>
        <draw:frame draw:style-name="gr2" draw:text-style-name="P3" draw:layer="layout" svg:width="0.387cm" svg:height="0.39cm" svg:x="3.641cm" svg:y="14.296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2.856cm" svg:height="0.352cm" svg:x="3.811cm" svg:y="14.323cm">
          <draw:text-box>
            <text:p text:style-name="P1"><text:span text:style-name="T4">Calculated Fields &amp; </text:span></text:p>
          </draw:text-box>
        </draw:frame>
        <draw:frame draw:style-name="gr4" draw:text-style-name="P5" draw:layer="layout" svg:width="1.747cm" svg:height="0.352cm" svg:x="3.811cm" svg:y="14.788cm">
          <draw:text-box>
            <text:p text:style-name="P1"><text:span text:style-name="T4">Worksheets</text:span></text:p>
          </draw:text-box>
        </draw:frame>
        <draw:frame draw:style-name="gr2" draw:text-style-name="P3" draw:layer="layout" svg:width="0.387cm" svg:height="0.39cm" svg:x="5.547cm" svg:y="14.762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7.593cm" svg:height="0.352cm" svg:x="7.341cm" svg:y="14.323cm">
          <draw:text-box>
            <text:p text:style-name="P1"><text:span text:style-name="T5">9 worksheets built on extract: KPI table, city, cuisine, </text:span></text:p>
          </draw:text-box>
        </draw:frame>
        <draw:frame draw:style-name="gr4" draw:text-style-name="P5" draw:layer="layout" svg:width="5.909cm" svg:height="0.352cm" svg:x="7.341cm" svg:y="14.788cm">
          <draw:text-box>
            <text:p text:style-name="P1"><text:span text:style-name="T5">meal-type revenue, rating, delivery time, </text:span></text:p>
          </draw:text-box>
        </draw:frame>
        <draw:frame draw:style-name="gr4" draw:text-style-name="P5" draw:layer="layout" svg:width="4.944cm" svg:height="0.352cm" svg:x="7.341cm" svg:y="15.247cm">
          <draw:text-box>
            <text:p text:style-name="P1"><text:span text:style-name="T5">age/segment, company/meal-type</text:span></text:p>
          </draw:text-box>
        </draw:frame>
        <draw:frame draw:style-name="gr2" draw:text-style-name="P3" draw:layer="layout" svg:width="0.387cm" svg:height="0.39cm" svg:x="12.28cm" svg:y="15.221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3.531cm" svg:height="0.352cm" svg:x="14.927cm" svg:y="14.323cm">
          <draw:text-box>
            <text:p text:style-name="P1"><text:span text:style-name="T5">Tableau Desktop — Calc </text:span></text:p>
          </draw:text-box>
        </draw:frame>
        <draw:frame draw:style-name="gr4" draw:text-style-name="P5" draw:layer="layout" svg:width="1.723cm" svg:height="0.352cm" svg:x="14.927cm" svg:y="14.788cm">
          <draw:text-box>
            <text:p text:style-name="P1"><text:span text:style-name="T5">Fields, LODs</text:span></text:p>
          </draw:text-box>
        </draw:frame>
        <draw:polygon draw:style-name="gr10" draw:text-style-name="P11" draw:layer="layout" svg:width="0.022cm" svg:height="0.056cm" svg:x="2.547cm" svg:y="14.192cm" svg:viewBox="0 0 23 57" draw:points="0,0 23,0 23,57 0,57">
          <text:p/>
        </draw:polygon>
        <draw:polygon draw:style-name="gr10" draw:text-style-name="P11" draw:layer="layout" svg:width="1.213cm" svg:height="0.021cm" svg:x="2.569cm" svg:y="14.192cm" svg:viewBox="0 0 1214 22" draw:points="0,0 1214,0 1214,22 0,22">
          <text:p/>
        </draw:polygon>
        <draw:polygon draw:style-name="gr10" draw:text-style-name="P11" draw:layer="layout" svg:width="0.021cm" svg:height="0.056cm" svg:x="3.782cm" svg:y="14.192cm" svg:viewBox="0 0 22 57" draw:points="0,0 22,0 22,57 0,57">
          <text:p/>
        </draw:polygon>
        <draw:polygon draw:style-name="gr10" draw:text-style-name="P11" draw:layer="layout" svg:width="3.508cm" svg:height="0.021cm" svg:x="3.804cm" svg:y="14.192cm" svg:viewBox="0 0 3509 22" draw:points="0,0 3509,0 3509,22 0,22">
          <text:p/>
        </draw:polygon>
        <draw:polygon draw:style-name="gr10" draw:text-style-name="P11" draw:layer="layout" svg:width="0.021cm" svg:height="0.056cm" svg:x="7.312cm" svg:y="14.192cm" svg:viewBox="0 0 22 57" draw:points="0,0 22,0 22,57 0,57">
          <text:p/>
        </draw:polygon>
        <draw:polygon draw:style-name="gr10" draw:text-style-name="P11" draw:layer="layout" svg:width="7.565cm" svg:height="0.021cm" svg:x="7.333cm" svg:y="14.192cm" svg:viewBox="0 0 7566 22" draw:points="0,0 7566,0 7566,22 0,22">
          <text:p/>
        </draw:polygon>
        <draw:polygon draw:style-name="gr10" draw:text-style-name="P11" draw:layer="layout" svg:width="0.022cm" svg:height="0.056cm" svg:x="14.898cm" svg:y="14.192cm" svg:viewBox="0 0 23 57" draw:points="0,0 23,0 23,57 0,57">
          <text:p/>
        </draw:polygon>
        <draw:polygon draw:style-name="gr10" draw:text-style-name="P11" draw:layer="layout" svg:width="3.508cm" svg:height="0.021cm" svg:x="14.92cm" svg:y="14.192cm" svg:viewBox="0 0 3509 22" draw:points="0,0 3509,0 3509,22 0,22">
          <text:p/>
        </draw:polygon>
        <draw:polygon draw:style-name="gr10" draw:text-style-name="P11" draw:layer="layout" svg:width="0.021cm" svg:height="0.056cm" svg:x="18.428cm" svg:y="14.192cm" svg:viewBox="0 0 22 57" draw:points="0,0 22,0 22,57 0,57">
          <text:p/>
        </draw:polygon>
        <draw:polygon draw:style-name="gr10" draw:text-style-name="P11" draw:layer="layout" svg:width="0.022cm" svg:height="1.461cm" svg:x="2.547cm" svg:y="14.248cm" svg:viewBox="0 0 23 1462" draw:points="0,0 23,0 23,1462 0,1462">
          <text:p/>
        </draw:polygon>
        <draw:polygon draw:style-name="gr10" draw:text-style-name="P11" draw:layer="layout" svg:width="0.021cm" svg:height="1.461cm" svg:x="3.782cm" svg:y="14.248cm" svg:viewBox="0 0 22 1462" draw:points="0,0 22,0 22,1462 0,1462">
          <text:p/>
        </draw:polygon>
        <draw:polygon draw:style-name="gr10" draw:text-style-name="P11" draw:layer="layout" svg:width="0.021cm" svg:height="1.461cm" svg:x="7.312cm" svg:y="14.248cm" svg:viewBox="0 0 22 1462" draw:points="0,0 22,0 22,1462 0,1462">
          <text:p/>
        </draw:polygon>
        <draw:polygon draw:style-name="gr10" draw:text-style-name="P11" draw:layer="layout" svg:width="0.022cm" svg:height="1.461cm" svg:x="14.898cm" svg:y="14.248cm" svg:viewBox="0 0 23 1462" draw:points="0,0 23,0 23,1462 0,1462">
          <text:p/>
        </draw:polygon>
        <draw:polygon draw:style-name="gr10" draw:text-style-name="P11" draw:layer="layout" svg:width="0.021cm" svg:height="1.461cm" svg:x="18.428cm" svg:y="14.248cm" svg:viewBox="0 0 22 1462" draw:points="0,0 22,0 22,1462 0,1462">
          <text:p/>
        </draw:polygon>
        <draw:frame draw:style-name="gr2" draw:text-style-name="P3" draw:layer="layout" svg:width="0.387cm" svg:height="0.39cm" svg:x="16.649cm" svg:y="14.762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05cm" svg:height="0.352cm" svg:x="2.597cm" svg:y="15.833cm">
          <draw:text-box>
            <text:p text:style-name="P1"><text:span text:style-name="T4">Layer 5</text:span></text:p>
          </draw:text-box>
        </draw:frame>
        <draw:frame draw:style-name="gr2" draw:text-style-name="P3" draw:layer="layout" svg:width="0.387cm" svg:height="0.39cm" svg:x="3.641cm" svg:y="15.806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2.765cm" svg:height="0.352cm" svg:x="3.811cm" svg:y="15.833cm">
          <draw:text-box>
            <text:p text:style-name="P1"><text:span text:style-name="T4">Dashboard &amp; Story</text:span></text:p>
          </draw:text-box>
        </draw:frame>
        <draw:frame draw:style-name="gr2" draw:text-style-name="P3" draw:layer="layout" svg:width="0.387cm" svg:height="0.39cm" svg:x="6.578cm" svg:y="15.806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6.269cm" svg:height="0.352cm" svg:x="7.341cm" svg:y="15.833cm">
          <draw:text-box>
            <text:p text:style-name="P1"><text:span text:style-name="T5">Worksheets assembled into one interactive </text:span></text:p>
          </draw:text-box>
        </draw:frame>
        <draw:frame draw:style-name="gr4" draw:text-style-name="P5" draw:layer="layout" svg:width="6.946cm" svg:height="0.352cm" svg:x="7.341cm" svg:y="16.298cm">
          <draw:text-box>
            <text:p text:style-name="P1"><text:span text:style-name="T5">Dashboard; sequenced into a Story for narrative </text:span></text:p>
          </draw:text-box>
        </draw:frame>
        <draw:frame draw:style-name="gr4" draw:text-style-name="P5" draw:layer="layout" svg:width="1.832cm" svg:height="0.352cm" svg:x="7.341cm" svg:y="16.764cm">
          <draw:text-box>
            <text:p text:style-name="P1"><text:span text:style-name="T5">presentation</text:span></text:p>
          </draw:text-box>
        </draw:frame>
        <draw:frame draw:style-name="gr2" draw:text-style-name="P3" draw:layer="layout" svg:width="0.387cm" svg:height="0.39cm" svg:x="9.161cm" svg:y="16.738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3.1cm" svg:height="0.352cm" svg:x="14.927cm" svg:y="15.833cm">
          <draw:text-box>
            <text:p text:style-name="P1"><text:span text:style-name="T5">Tableau Dashboard + </text:span></text:p>
          </draw:text-box>
        </draw:frame>
        <draw:frame draw:style-name="gr4" draw:text-style-name="P5" draw:layer="layout" svg:width="1.96cm" svg:height="0.352cm" svg:x="14.927cm" svg:y="16.298cm">
          <draw:text-box>
            <text:p text:style-name="P1"><text:span text:style-name="T5">Tableau Story</text:span></text:p>
          </draw:text-box>
        </draw:frame>
        <draw:polygon draw:style-name="gr10" draw:text-style-name="P11" draw:layer="layout" svg:width="0.022cm" svg:height="0.056cm" svg:x="2.547cm" svg:y="15.709cm" svg:viewBox="0 0 23 57" draw:points="0,0 23,0 23,57 0,57">
          <text:p/>
        </draw:polygon>
        <draw:polygon draw:style-name="gr10" draw:text-style-name="P11" draw:layer="layout" svg:width="1.213cm" svg:height="0.021cm" svg:x="2.569cm" svg:y="15.709cm" svg:viewBox="0 0 1214 22" draw:points="0,0 1214,0 1214,22 0,22">
          <text:p/>
        </draw:polygon>
        <draw:polygon draw:style-name="gr10" draw:text-style-name="P11" draw:layer="layout" svg:width="0.021cm" svg:height="0.056cm" svg:x="3.782cm" svg:y="15.709cm" svg:viewBox="0 0 22 57" draw:points="0,0 22,0 22,57 0,57">
          <text:p/>
        </draw:polygon>
        <draw:polygon draw:style-name="gr10" draw:text-style-name="P11" draw:layer="layout" svg:width="3.508cm" svg:height="0.021cm" svg:x="3.804cm" svg:y="15.709cm" svg:viewBox="0 0 3509 22" draw:points="0,0 3509,0 3509,22 0,22">
          <text:p/>
        </draw:polygon>
        <draw:polygon draw:style-name="gr10" draw:text-style-name="P11" draw:layer="layout" svg:width="0.021cm" svg:height="0.056cm" svg:x="7.312cm" svg:y="15.709cm" svg:viewBox="0 0 22 57" draw:points="0,0 22,0 22,57 0,57">
          <text:p/>
        </draw:polygon>
        <draw:polygon draw:style-name="gr10" draw:text-style-name="P11" draw:layer="layout" svg:width="7.565cm" svg:height="0.021cm" svg:x="7.333cm" svg:y="15.709cm" svg:viewBox="0 0 7566 22" draw:points="0,0 7566,0 7566,22 0,22">
          <text:p/>
        </draw:polygon>
        <draw:polygon draw:style-name="gr10" draw:text-style-name="P11" draw:layer="layout" svg:width="0.022cm" svg:height="0.056cm" svg:x="14.898cm" svg:y="15.709cm" svg:viewBox="0 0 23 57" draw:points="0,0 23,0 23,57 0,57">
          <text:p/>
        </draw:polygon>
        <draw:polygon draw:style-name="gr10" draw:text-style-name="P11" draw:layer="layout" svg:width="3.508cm" svg:height="0.021cm" svg:x="14.92cm" svg:y="15.709cm" svg:viewBox="0 0 3509 22" draw:points="0,0 3509,0 3509,22 0,22">
          <text:p/>
        </draw:polygon>
        <draw:polygon draw:style-name="gr10" draw:text-style-name="P11" draw:layer="layout" svg:width="0.021cm" svg:height="0.056cm" svg:x="18.428cm" svg:y="15.709cm" svg:viewBox="0 0 22 57" draw:points="0,0 22,0 22,57 0,57">
          <text:p/>
        </draw:polygon>
        <draw:polygon draw:style-name="gr10" draw:text-style-name="P11" draw:layer="layout" svg:width="0.022cm" svg:height="1.454cm" svg:x="2.547cm" svg:y="15.765cm" svg:viewBox="0 0 23 1455" draw:points="0,0 23,0 23,1455 0,1455">
          <text:p/>
        </draw:polygon>
        <draw:polygon draw:style-name="gr10" draw:text-style-name="P11" draw:layer="layout" svg:width="0.021cm" svg:height="1.454cm" svg:x="3.782cm" svg:y="15.765cm" svg:viewBox="0 0 22 1455" draw:points="0,0 22,0 22,1455 0,1455">
          <text:p/>
        </draw:polygon>
        <draw:polygon draw:style-name="gr10" draw:text-style-name="P11" draw:layer="layout" svg:width="0.021cm" svg:height="1.454cm" svg:x="7.312cm" svg:y="15.765cm" svg:viewBox="0 0 22 1455" draw:points="0,0 22,0 22,1455 0,1455">
          <text:p/>
        </draw:polygon>
        <draw:polygon draw:style-name="gr10" draw:text-style-name="P11" draw:layer="layout" svg:width="0.022cm" svg:height="1.454cm" svg:x="14.898cm" svg:y="15.765cm" svg:viewBox="0 0 23 1455" draw:points="0,0 23,0 23,1455 0,1455">
          <text:p/>
        </draw:polygon>
        <draw:polygon draw:style-name="gr10" draw:text-style-name="P11" draw:layer="layout" svg:width="0.021cm" svg:height="1.454cm" svg:x="18.428cm" svg:y="15.765cm" svg:viewBox="0 0 22 1455" draw:points="0,0 22,0 22,1455 0,1455">
          <text:p/>
        </draw:polygon>
        <draw:frame draw:style-name="gr2" draw:text-style-name="P3" draw:layer="layout" svg:width="0.387cm" svg:height="0.39cm" svg:x="16.861cm" svg:y="16.272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05cm" svg:height="0.352cm" svg:x="2.597cm" svg:y="17.35cm">
          <draw:text-box>
            <text:p text:style-name="P1"><text:span text:style-name="T4">Layer 6</text:span></text:p>
          </draw:text-box>
        </draw:frame>
        <draw:frame draw:style-name="gr2" draw:text-style-name="P3" draw:layer="layout" svg:width="0.387cm" svg:height="0.39cm" svg:x="3.641cm" svg:y="17.323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2.126cm" svg:height="0.352cm" svg:x="3.811cm" svg:y="17.35cm">
          <draw:text-box>
            <text:p text:style-name="P1"><text:span text:style-name="T4">Tableau Public</text:span></text:p>
          </draw:text-box>
        </draw:frame>
        <draw:frame draw:style-name="gr2" draw:text-style-name="P3" draw:layer="layout" svg:width="0.387cm" svg:height="0.39cm" svg:x="5.921cm" svg:y="17.323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7.428cm" svg:height="0.352cm" svg:x="7.341cm" svg:y="17.35cm">
          <draw:text-box>
            <text:p text:style-name="P1"><text:span text:style-name="T5">Finished workbook published here — End Users get </text:span></text:p>
          </draw:text-box>
        </draw:frame>
        <draw:frame draw:style-name="gr4" draw:text-style-name="P5" draw:layer="layout" svg:width="7.174cm" svg:height="0.352cm" svg:x="7.341cm" svg:y="17.816cm">
          <draw:text-box>
            <text:p text:style-name="P1"><text:span text:style-name="T5">browser-based, view-only access without Tableau </text:span></text:p>
          </draw:text-box>
        </draw:frame>
        <draw:frame draw:style-name="gr4" draw:text-style-name="P5" draw:layer="layout" svg:width="1.211cm" svg:height="0.352cm" svg:x="7.341cm" svg:y="18.275cm">
          <draw:text-box>
            <text:p text:style-name="P1"><text:span text:style-name="T5">installed</text:span></text:p>
          </draw:text-box>
        </draw:frame>
        <draw:frame draw:style-name="gr2" draw:text-style-name="P3" draw:layer="layout" svg:width="0.387cm" svg:height="0.39cm" svg:x="8.547cm" svg:y="18.248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2.154cm" svg:height="0.352cm" svg:x="14.927cm" svg:y="17.35cm">
          <draw:text-box>
            <text:p text:style-name="P1"><text:span text:style-name="T5">Tableau Public </text:span></text:p>
          </draw:text-box>
        </draw:frame>
        <draw:frame draw:style-name="gr4" draw:text-style-name="P5" draw:layer="layout" svg:width="2.386cm" svg:height="0.352cm" svg:x="14.927cm" svg:y="17.816cm">
          <draw:text-box>
            <text:p text:style-name="P1"><text:span text:style-name="T5">(Salesforce CDN)</text:span></text:p>
          </draw:text-box>
        </draw:frame>
        <draw:polygon draw:style-name="gr10" draw:text-style-name="P11" draw:layer="layout" svg:width="0.022cm" svg:height="0.056cm" svg:x="2.547cm" svg:y="17.219cm" svg:viewBox="0 0 23 57" draw:points="0,0 23,0 23,57 0,57">
          <text:p/>
        </draw:polygon>
        <draw:polygon draw:style-name="gr10" draw:text-style-name="P11" draw:layer="layout" svg:width="1.213cm" svg:height="0.021cm" svg:x="2.569cm" svg:y="17.219cm" svg:viewBox="0 0 1214 22" draw:points="0,0 1214,0 1214,22 0,22">
          <text:p/>
        </draw:polygon>
        <draw:polygon draw:style-name="gr10" draw:text-style-name="P11" draw:layer="layout" svg:width="0.021cm" svg:height="0.056cm" svg:x="3.782cm" svg:y="17.219cm" svg:viewBox="0 0 22 57" draw:points="0,0 22,0 22,57 0,57">
          <text:p/>
        </draw:polygon>
        <draw:polygon draw:style-name="gr10" draw:text-style-name="P11" draw:layer="layout" svg:width="3.508cm" svg:height="0.021cm" svg:x="3.804cm" svg:y="17.219cm" svg:viewBox="0 0 3509 22" draw:points="0,0 3509,0 3509,22 0,22">
          <text:p/>
        </draw:polygon>
        <draw:polygon draw:style-name="gr10" draw:text-style-name="P11" draw:layer="layout" svg:width="0.021cm" svg:height="0.056cm" svg:x="7.312cm" svg:y="17.219cm" svg:viewBox="0 0 22 57" draw:points="0,0 22,0 22,57 0,57">
          <text:p/>
        </draw:polygon>
        <draw:polygon draw:style-name="gr10" draw:text-style-name="P11" draw:layer="layout" svg:width="7.565cm" svg:height="0.021cm" svg:x="7.333cm" svg:y="17.219cm" svg:viewBox="0 0 7566 22" draw:points="0,0 7566,0 7566,22 0,22">
          <text:p/>
        </draw:polygon>
        <draw:polygon draw:style-name="gr10" draw:text-style-name="P11" draw:layer="layout" svg:width="0.022cm" svg:height="0.056cm" svg:x="14.898cm" svg:y="17.219cm" svg:viewBox="0 0 23 57" draw:points="0,0 23,0 23,57 0,57">
          <text:p/>
        </draw:polygon>
        <draw:polygon draw:style-name="gr10" draw:text-style-name="P11" draw:layer="layout" svg:width="3.508cm" svg:height="0.021cm" svg:x="14.92cm" svg:y="17.219cm" svg:viewBox="0 0 3509 22" draw:points="0,0 3509,0 3509,22 0,22">
          <text:p/>
        </draw:polygon>
        <draw:polygon draw:style-name="gr10" draw:text-style-name="P11" draw:layer="layout" svg:width="0.021cm" svg:height="0.056cm" svg:x="18.428cm" svg:y="17.219cm" svg:viewBox="0 0 22 57" draw:points="0,0 22,0 22,57 0,57">
          <text:p/>
        </draw:polygon>
        <draw:polygon draw:style-name="gr10" draw:text-style-name="P11" draw:layer="layout" svg:width="0.022cm" svg:height="1.462cm" svg:x="2.547cm" svg:y="17.275cm" svg:viewBox="0 0 23 1463" draw:points="0,0 23,0 23,1463 0,1463">
          <text:p/>
        </draw:polygon>
        <draw:polygon draw:style-name="gr10" draw:text-style-name="P11" draw:layer="layout" svg:width="0.022cm" svg:height="0.021cm" svg:x="2.547cm" svg:y="18.737cm" svg:viewBox="0 0 23 22" draw:points="0,0 23,0 23,22 0,22">
          <text:p/>
        </draw:polygon>
        <draw:polygon draw:style-name="gr10" draw:text-style-name="P11" draw:layer="layout" svg:width="0.022cm" svg:height="0.021cm" svg:x="2.547cm" svg:y="18.737cm" svg:viewBox="0 0 23 22" draw:points="0,0 23,0 23,22 0,22">
          <text:p/>
        </draw:polygon>
        <draw:polygon draw:style-name="gr10" draw:text-style-name="P11" draw:layer="layout" svg:width="1.213cm" svg:height="0.021cm" svg:x="2.569cm" svg:y="18.737cm" svg:viewBox="0 0 1214 22" draw:points="0,0 1214,0 1214,22 0,22">
          <text:p/>
        </draw:polygon>
        <draw:polygon draw:style-name="gr10" draw:text-style-name="P11" draw:layer="layout" svg:width="0.021cm" svg:height="1.462cm" svg:x="3.782cm" svg:y="17.275cm" svg:viewBox="0 0 22 1463" draw:points="0,0 22,0 22,1463 0,1463">
          <text:p/>
        </draw:polygon>
        <draw:polygon draw:style-name="gr10" draw:text-style-name="P11" draw:layer="layout" svg:width="0.021cm" svg:height="0.021cm" svg:x="3.782cm" svg:y="18.737cm" svg:viewBox="0 0 22 22" draw:points="0,0 22,0 22,22 0,22">
          <text:p/>
        </draw:polygon>
        <draw:polygon draw:style-name="gr10" draw:text-style-name="P11" draw:layer="layout" svg:width="3.508cm" svg:height="0.021cm" svg:x="3.804cm" svg:y="18.737cm" svg:viewBox="0 0 3509 22" draw:points="0,0 3509,0 3509,22 0,22">
          <text:p/>
        </draw:polygon>
        <draw:polygon draw:style-name="gr10" draw:text-style-name="P11" draw:layer="layout" svg:width="0.021cm" svg:height="1.462cm" svg:x="7.312cm" svg:y="17.275cm" svg:viewBox="0 0 22 1463" draw:points="0,0 22,0 22,1463 0,1463">
          <text:p/>
        </draw:polygon>
        <draw:polygon draw:style-name="gr10" draw:text-style-name="P11" draw:layer="layout" svg:width="0.021cm" svg:height="0.021cm" svg:x="7.312cm" svg:y="18.737cm" svg:viewBox="0 0 22 22" draw:points="0,0 22,0 22,22 0,22">
          <text:p/>
        </draw:polygon>
        <draw:polygon draw:style-name="gr10" draw:text-style-name="P11" draw:layer="layout" svg:width="7.565cm" svg:height="0.021cm" svg:x="7.333cm" svg:y="18.737cm" svg:viewBox="0 0 7566 22" draw:points="0,0 7566,0 7566,22 0,22">
          <text:p/>
        </draw:polygon>
        <draw:polygon draw:style-name="gr10" draw:text-style-name="P11" draw:layer="layout" svg:width="0.022cm" svg:height="1.462cm" svg:x="14.898cm" svg:y="17.275cm" svg:viewBox="0 0 23 1463" draw:points="0,0 23,0 23,1463 0,1463">
          <text:p/>
        </draw:polygon>
        <draw:polygon draw:style-name="gr10" draw:text-style-name="P11" draw:layer="layout" svg:width="0.022cm" svg:height="0.021cm" svg:x="14.898cm" svg:y="18.737cm" svg:viewBox="0 0 23 22" draw:points="0,0 23,0 23,22 0,22">
          <text:p/>
        </draw:polygon>
        <draw:polygon draw:style-name="gr10" draw:text-style-name="P11" draw:layer="layout" svg:width="3.508cm" svg:height="0.021cm" svg:x="14.92cm" svg:y="18.737cm" svg:viewBox="0 0 3509 22" draw:points="0,0 3509,0 3509,22 0,22">
          <text:p/>
        </draw:polygon>
        <draw:polygon draw:style-name="gr10" draw:text-style-name="P11" draw:layer="layout" svg:width="0.021cm" svg:height="1.462cm" svg:x="18.428cm" svg:y="17.275cm" svg:viewBox="0 0 22 1463" draw:points="0,0 22,0 22,1463 0,1463">
          <text:p/>
        </draw:polygon>
        <draw:polygon draw:style-name="gr10" draw:text-style-name="P11" draw:layer="layout" svg:width="0.021cm" svg:height="0.021cm" svg:x="18.428cm" svg:y="18.737cm" svg:viewBox="0 0 22 22" draw:points="0,0 22,0 22,22 0,22">
          <text:p/>
        </draw:polygon>
        <draw:polygon draw:style-name="gr10" draw:text-style-name="P11" draw:layer="layout" svg:width="0.021cm" svg:height="0.021cm" svg:x="18.428cm" svg:y="18.737cm" svg:viewBox="0 0 22 22" draw:points="0,0 22,0 22,22 0,22">
          <text:p/>
        </draw:polygon>
        <draw:line draw:style-name="gr11" draw:text-style-name="P8" draw:layer="layout" svg:x1="2.517cm" svg:y1="8.362cm" svg:x2="2.517cm" svg:y2="7.877cm">
          <text:p/>
        </draw:line>
        <draw:line draw:style-name="gr11" draw:text-style-name="P8" draw:layer="layout" svg:x1="2.517cm" svg:y1="8.362cm" svg:x2="2.517cm" svg:y2="7.877cm">
          <text:p/>
        </draw:line>
        <draw:line draw:style-name="gr12" draw:text-style-name="P8" draw:layer="layout" svg:x1="18.476cm" svg:y1="17.658cm" svg:x2="18.476cm" svg:y2="17.173cm">
          <text:p/>
        </draw:line>
        <draw:line draw:style-name="gr12" draw:text-style-name="P8" draw:layer="layout" svg:x1="18.476cm" svg:y1="17.658cm" svg:x2="18.476cm" svg:y2="17.173cm">
          <text:p/>
        </draw:line>
        <draw:frame draw:style-name="gr2" draw:text-style-name="P3" draw:layer="layout" svg:width="0.387cm" svg:height="0.39cm" svg:x="17.306cm" svg:y="17.79cm">
          <draw:text-box>
            <text:p text:style-name="P1"><text:span text:style-name="T2"><text:s/></text:span></text:p>
          </draw:text-box>
        </draw:frame>
      </draw:page>
      <draw:page draw:name="page2" draw:style-name="dp1" draw:master-page-name="master-page48">
        <draw:frame draw:style-name="gr2" draw:text-style-name="P3" draw:layer="layout" svg:width="0.387cm" svg:height="0.39cm" svg:x="18.464cm" svg:y="11.861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3.65cm" svg:height="0.352cm" svg:x="3.423cm" svg:y="13.045cm">
          <draw:text-box>
            <text:p text:style-name="P1"><text:span text:style-name="T7">Figure 2: Cuisine Demand &amp; Order Trends Analysis Dashboard — built in Tableau Desktop/Public</text:span></text:p>
          </draw:text-box>
        </draw:frame>
        <draw:frame draw:style-name="gr7" draw:text-style-name="P8" draw:layer="layout" svg:width="7.534cm" svg:height="0.62cm" svg:x="2.547cm" svg:y="2.794cm">
          <draw:image xlink:href="Pictures/100000010000025100000030D18CA9FA.png" xlink:type="simple" xlink:show="embed" xlink:actuate="onLoad" draw:mime-type="image/png">
            <text:p/>
          </draw:image>
        </draw:frame>
        <draw:path draw:style-name="gr10" draw:text-style-name="P11" draw:layer="layout" svg:width="1.433cm" svg:height="0.292cm" svg:x="2.648cm" svg:y="2.908cm" svg:viewBox="0 0 1434 293" svg:d="M219 42c0 4 0 8-1 11 0 3-1 5-1 6-1 2-2 4-3 4-1 1-2 2-4 2h-71v216c0 2-1 3-2 4s-2 2-5 3c-2 0-5 1-8 1-4 1-9 1-15 1-5 0-10 0-14-1-3 0-6-1-9-1-2-1-3-2-4-3s-2-2-2-4v-216h-71c-2 0-3-1-4-2-1 0-2-2-3-4-1-1-1-3-1-6-1-3-1-7-1-11s0-7 1-10c0-3 0-5 1-7s2-3 3-4c1 0 2-1 4-1h201c2 0 3 1 4 1 1 1 2 2 3 4 0 2 1 4 1 7 1 3 1 6 1 10zM384 282c0 2-1 4-2 5-2 1-4 2-7 2-4 1-8 1-14 1-7 0-12 0-15-1-3 0-5-1-6-2-2-1-2-3-2-5v-15c-8 9-18 15-28 20-10 4-22 6-35 6-10 0-20-1-28-3-9-3-17-7-23-12-7-5-12-11-15-19-4-7-5-15-5-25 0-11 2-20 6-29 5-7 11-14 20-19s20-9 34-12c13-2 28-4 46-4h19v-10c0-7 0-12-2-17-1-4-3-8-6-11-3-2-7-4-11-6-5-1-11-2-18-2-10 0-18 1-25 3s-14 4-19 6c-6 3-11 5-14 6-4 3-7 4-10 4-1 0-3-1-4-2s-2-2-3-4-2-4-2-7c0-2-1-5-1-8 0-5 1-8 1-10 1-3 3-5 5-7s5-4 11-7c5-2 11-4 18-6 7-3 14-4 22-5 9-2 17-3 26-3 15 0 28 2 39 5s20 7 27 13c8 6 13 13 16 22 3 10 5 20 5 33zM329 203h-21c-9 0-17 1-23 2s-12 3-16 6c-4 2-6 5-8 9-2 3-3 7-3 12 0 8 3 14 8 18s12 7 22 7c7 0 15-2 21-6 7-4 13-9 20-16zM633 187c0 16-2 31-6 44s-9 25-16 34c-8 9-16 16-27 21s-22 7-36 7c-7 0-13 0-18-2-6-1-12-2-17-5s-10-6-15-10c-6-4-11-9-16-14v20c0 1 0 2-1 3-1 2-2 2-4 3s-5 1-8 1c-3 1-6 1-11 1-4 0-8 0-11-1-3 0-6 0-8-1-1-1-3-1-3-3-1-1-2-2-2-3v-273c0-1 1-3 2-4s2-2 4-3c2 0 5-1 9-1 3-1 8-1 13-1 6 0 10 0 14 1 3 0 6 1 8 1 2 1 4 2 5 3s1 3 1 4v102c5-5 10-9 15-12 5-4 10-6 15-9 5-2 10-3 16-4 5-1 11-2 17-2 14 0 27 3 37 9 10 5 18 12 25 22 6 9 11 20 14 32 3 13 4 26 4 40zM575 191c0-8 0-16-2-23-1-7-3-15-6-20-3-6-7-11-12-14s-11-5-19-5c-4 0-7 0-11 1-3 1-7 3-11 5-3 3-7 6-11 9-4 4-8 9-13 14v63c8 9 15 16 23 21 7 5 14 7 22 7 7 0 13-2 18-5s10-8 13-14c3-5 6-11 7-18 2-7 2-14 2-21zM730 282c0 1 0 2-1 3s-3 2-5 3-5 1-8 1c-4 1-8 1-14 1-5 0-10 0-13-1-4 0-7 0-9-1s-3-2-4-3-2-2-2-3v-273c0-1 1-3 2-4s2-2 4-3c2 0 5-1 9-1 3-1 8-1 13-1 6 0 10 0 14 1 3 0 6 1 8 1 2 1 4 2 5 3s1 3 1 4zM978 184c0 6-2 11-5 14s-7 5-13 5h-121c0 8 1 15 3 21s6 12 10 16c4 5 10 8 17 11 7 2 15 3 24 3 10 0 19-1 26-2s15-2 20-4 10-3 14-4c3-2 6-3 8-3 1 0 3 1 4 1 0 1 1 2 2 3 0 1 1 3 1 5s0 5 0 9c0 3 0 5 0 7 0 3 0 4-1 6 0 1 0 3-1 4s-1 2-2 3-4 2-8 4c-4 1-10 3-16 5-7 1-16 2-24 3-9 2-18 2-28 2-17 0-33-2-46-6s-24-10-33-18c-9-9-15-19-20-33-4-12-6-27-6-44s2-32 7-46c4-13 11-24 20-33 8-9 19-17 31-21 13-5 27-8 43-8s30 3 42 7c12 5 22 11 30 19 7 8 13 18 16 29 4 11 6 24 6 37zM923 169c0-15-3-27-10-35-7-9-17-13-31-13-7 0-13 2-18 4-6 3-10 6-13 10-4 4-7 9-8 15-2 6-3 13-4 19zM1189 282c0 2-1 4-2 5-2 1-4 2-7 2-3 1-8 1-14 1-7 0-12 0-14-1-4 0-6-1-7-2s-2-3-2-5v-15c-8 9-17 15-28 20-10 4-22 6-34 6-11 0-20-1-29-3-9-3-17-7-23-12s-11-11-15-19c-3-7-5-15-5-25 0-11 2-20 7-29 4-7 11-14 20-19s20-9 33-12c13-2 29-4 46-4h20v-10c0-7-1-12-2-17-2-4-4-8-6-11-3-2-7-4-12-6-5-1-11-2-18-2-9 0-17 1-25 3-7 2-14 4-19 6-6 3-10 5-14 6-4 3-7 4-9 4s-3-1-5-2c-1-1-2-2-3-4s-1-4-2-7c0-2 0-5 0-8 0-5 0-8 1-10 0-3 2-5 4-7s6-4 11-7c5-2 11-4 18-6 7-3 14-4 23-5 8-2 16-3 25-3 15 0 29 2 40 5s20 7 27 13 12 13 15 22c4 10 5 20 5 33zM1135 203h-22c-9 0-16 1-23 2-6 1-11 3-15 6-4 2-7 5-9 9-2 3-3 7-3 12 0 8 3 14 8 18s12 7 22 7c8 0 15-2 22-6 6-4 13-9 20-16zM1434 282c0 1-1 2-1 3-1 1-2 2-4 3s-4 1-7 1c-3 1-7 1-12 1-4 0-9 0-11-1-4 0-6 0-8-1s-3-2-3-3c-1-1-1-2-1-3v-22c-11 11-23 19-34 25s-23 8-35 8c-14 0-25-2-34-6s-17-10-22-17c-6-7-10-15-13-25-2-9-3-21-3-35v-114c0-1 0-2 1-3s2-2 4-3c3-1 5-1 9-2 4 0 8 0 13 0 6 0 10 0 14 0 4 1 6 1 8 2 3 1 4 2 5 3s1 2 1 3v106c0 9 1 16 2 21 2 6 3 10 6 14 3 3 7 6 11 8s9 3 14 3c7 0 14-2 22-7 7-5 15-12 23-21v-124c0-1 0-2 1-3s2-2 4-3c3-1 5-1 9-2 3 0 8 0 13 0 6 0 10 0 14 0 3 1 6 1 8 2s4 2 5 3c0 1 1 2 1 3z">
          <text:p/>
        </draw:path>
        <draw:path draw:style-name="gr10" draw:text-style-name="P11" draw:layer="layout" svg:width="1.983cm" svg:height="0.292cm" svg:x="4.25cm" svg:y="2.908cm" svg:viewBox="0 0 1984 293" svg:d="M238 150c0 25-4 47-11 64-6 18-16 32-29 43s-29 19-47 24-40 8-66 8h-68c-5 0-9-2-12-4-3-3-5-7-5-14v-234c0-6 2-10 5-13 3-2 7-4 12-4h73c26 0 48 3 65 9 18 5 33 13 45 24s22 25 28 41 10 35 10 56zM178 152c0-13-2-24-5-35-4-11-8-21-16-29-7-8-15-14-26-18-12-5-26-7-44-7h-29v183h30c16 0 30-2 41-6 10-4 19-10 27-18 7-7 12-17 16-29 4-11 6-25 6-41zM454 282c0 2-1 4-2 5-2 1-4 2-7 2-4 1-8 1-14 1-7 0-12 0-15-1-3 0-5-1-6-2s-2-3-2-5v-15c-8 9-17 15-28 20-10 4-22 6-35 6-10 0-20-1-28-3-9-3-17-7-23-12s-11-11-15-19c-3-7-5-15-5-25 0-11 2-20 7-29 4-7 11-14 20-19s19-9 33-12c13-2 28-4 46-4h19v-10c0-7 0-12-2-17-1-4-3-8-6-11-2-2-6-4-11-6-5-1-11-2-18-2-9 0-18 1-25 3s-14 4-19 6c-6 3-11 5-14 6-4 3-7 4-10 4-1 0-2-1-4-2-1-1-2-2-3-4s-1-4-2-7c0-2-1-5-1-8 0-5 1-8 2-10 0-3 2-5 4-7s5-4 11-7c5-2 11-4 18-6 7-3 14-4 23-5 8-2 16-3 25-3 15 0 29 2 40 5 10 3 20 7 27 13s12 13 15 22c3 10 5 20 5 33zM399 203h-21c-9 0-17 1-23 2s-11 3-16 6c-3 2-6 5-8 9-2 3-3 7-3 12 0 8 3 14 8 18s12 7 22 7c8 0 15-2 21-6 7-4 13-9 20-16zM644 229c0 11-3 20-7 28s-10 15-18 20c-7 6-16 10-27 12-10 3-22 4-34 4-7 0-14 0-21-1s-13-3-18-4c-5-2-10-3-13-5-4-2-6-3-8-5-2-1-3-3-4-6s-1-8-1-14c0-4 0-7 0-10 1-2 1-4 2-6 0-1 1-2 2-2 1-1 2-1 3-1 2 0 4 1 7 2 4 2 7 4 12 6s10 4 17 6c6 2 13 3 21 3 5 0 9-1 14-2 3-1 7-2 9-4 4-2 6-4 7-7 2-3 2-6 2-9 0-5-1-8-4-11-2-3-6-6-11-8-4-2-9-4-15-6s-11-4-17-6c-6-3-12-5-18-9-6-2-11-6-15-10-5-5-8-10-11-16-3-7-4-15-4-24s2-17 6-24c3-7 8-14 16-19 6-5 15-9 25-12s21-5 33-5c6 0 12 1 18 2s11 2 16 3 9 3 12 4 6 2 7 3c1 2 2 3 3 4s1 2 1 4c1 1 1 3 1 5s0 4 0 8c0 3 0 7 0 9s0 4-1 5c0 2-1 3-2 3-1 1-2 1-3 1s-4-1-6-2c-3-2-7-3-11-5s-9-3-14-5c-6-1-12-2-19-2-5 0-10 1-14 2-3 1-6 2-8 4-3 2-5 4-6 6-1 3-2 5-2 8 0 4 2 8 4 10 3 4 7 6 12 9 4 2 9 4 15 7 6 1 12 3 18 6 6 2 12 5 18 8s11 6 15 11c5 4 9 10 11 16 3 6 5 13 5 21zM877 282c0 1 0 2-1 3s-2 2-4 3-5 1-9 1c-4 1-8 1-13 1-6 0-10 0-14-1-3 0-6 0-8-1s-4-2-5-3-1-2-1-3v-106c0-9-1-15-2-22-1-5-4-9-6-13-3-3-6-6-11-8-4-2-8-3-14-3-7 0-15 2-22 7s-14 12-22 21v124c0 1-1 2-2 3 0 1-2 2-4 3s-5 1-9 1c-3 1-8 1-13 1s-10 0-14-1c-4 0-7 0-9-1s-4-2-5-3-1-2-1-3v-273c0-1 0-3 1-4s3-2 5-3c2 0 5-1 9-1 4-1 9-1 14-1s10 0 13 1c4 0 7 1 9 1 2 1 4 2 4 3 1 1 2 3 2 4v102c9-9 19-16 29-20s21-7 31-7c14 0 25 3 34 7s17 9 23 17c5 7 9 15 12 25 2 9 3 21 3 36zM1128 187c0 16-2 31-6 44s-10 25-17 34-16 16-26 21c-11 5-23 7-36 7-7 0-13 0-19-2-6-1-11-2-16-5-6-3-11-6-16-10s-10-9-15-14v20c0 1-1 2-2 3-1 2-2 2-4 3s-4 1-7 1c-3 1-7 1-11 1-5 0-9 0-12-1-3 0-5 0-7-1s-3-1-4-3c-1-1-1-2-1-3v-273c0-1 0-3 1-4s3-2 5-3c2 0 5-1 8-1 4-1 9-1 14-1s10 0 13 1c4 0 7 1 9 1 2 1 4 2 4 3 1 1 2 3 2 4v102c5-5 10-9 15-12 5-4 10-6 15-9 5-2 10-3 15-4s11-2 17-2c15 0 27 3 37 9 10 5 18 12 25 22 7 9 11 20 14 32 3 13 5 26 5 40zM1070 191c0-8-1-16-2-23s-4-15-6-20c-4-6-8-11-13-14s-11-5-18-5c-4 0-8 0-11 1-4 1-7 3-11 5-4 3-8 6-12 9-4 4-8 9-12 14v63c7 9 15 16 22 21s15 7 22 7c8 0 14-2 19-5s9-8 13-14c3-5 5-11 7-18 1-7 2-14 2-21zM1376 187c0 16-3 31-7 43-5 14-11 25-20 34s-21 17-34 22c-14 5-30 7-48 7-17 0-33-2-46-6-13-5-23-12-32-20-9-9-15-20-19-32-4-13-6-27-6-44 0-16 2-30 7-44 4-13 11-24 20-33s20-17 34-22c13-5 29-8 47-8s33 3 46 7c13 5 24 11 32 20 9 9 15 19 19 32s7 28 7 44zM1318 190c0-9-1-18-2-26-2-8-4-15-8-20-4-6-9-10-15-14-6-3-14-4-23-4-8 0-15 1-21 4-7 3-12 7-16 12-4 6-7 12-9 21-2 7-3 16-3 26 0 9 1 17 2 25 2 8 5 14 9 20 3 6 8 10 14 13s14 5 23 5c8 0 16-1 22-4s12-7 15-13c4-5 7-12 9-19 2-8 3-17 3-26zM1584 282c0 2-1 4-2 5-2 1-4 2-7 2-4 1-8 1-14 1-7 0-12 0-15-1-3 0-5-1-6-2s-2-3-2-5v-15c-8 9-17 15-28 20-10 4-22 6-35 6-10 0-20-1-29-3-8-3-16-7-22-12s-11-11-15-19c-3-7-5-15-5-25 0-11 2-20 6-29 5-7 11-14 21-19 8-5 19-9 33-12 13-2 28-4 46-4h19v-10c0-7 0-12-2-17-1-4-3-8-6-11-3-2-6-4-11-6-5-1-11-2-18-2-10 0-18 1-25 3s-14 4-19 6c-6 3-11 5-15 6-3 3-6 4-9 4-1 0-3-1-4-2s-2-2-3-4-2-4-2-7c0-2-1-5-1-8 0-5 1-8 1-10 1-3 3-5 5-7s5-4 11-7c5-2 11-4 18-6 7-3 14-4 22-5 9-2 17-3 26-3 15 0 28 2 39 5s21 7 28 13 12 13 15 22c3 10 5 20 5 33zM1529 203h-21c-9 0-17 1-23 2s-11 3-16 6c-4 2-6 5-8 9-2 3-3 7-3 12 0 8 3 14 8 18s12 7 22 7c7 0 15-2 21-6 7-4 13-9 20-16zM1761 113c0 5 0 10 0 13-1 3-1 5-2 7 0 2-1 3-2 4-1 0-2 1-4 1-1 0-2 0-4-1-1 0-3-1-4-1-2-1-4-1-6-2-3 0-5-1-8-1s-6 1-9 2-6 3-10 6c-3 2-7 5-10 9-4 5-8 11-12 17v115c0 1 0 2-1 3s-3 2-5 3-5 1-8 1c-4 1-8 1-14 1-5 0-10 0-13-1-4 0-6 0-9-1-2-1-3-2-4-3s-2-2-2-3v-186c0-1 1-2 2-3 0-1 2-2 3-3 3-1 5-1 8-2 3 0 7 0 11 0 5 0 9 0 12 0 3 1 6 1 7 2 2 1 3 2 4 3s1 2 1 3v23c5-7 10-12 15-17 4-4 8-8 13-10 4-3 8-5 12-6s8-2 12-2c2 0 5 0 7 1 2 0 4 0 6 1 3 0 5 1 7 2 1 0 3 1 4 1 0 1 1 2 1 3 1 1 1 2 1 3 1 1 1 4 1 7s0 6 0 11zM1984 282c0 1-1 2-1 3-1 2-2 2-4 3s-4 1-7 1c-3 1-7 1-11 1-5 0-9 0-12-1-3 0-5 0-7-1s-3-1-4-3c-1-1-1-2-1-3v-21c-10 10-21 18-32 24-11 5-24 8-37 8-15 0-28-2-38-8-11-5-19-13-26-22s-11-20-14-32c-3-13-5-26-5-39 0-17 2-31 6-45 4-13 9-24 17-34 7-9 16-16 27-21 10-5 23-8 37-8 11 0 21 3 30 7s18 10 27 18v-100c0-1 0-2 1-3 0-1 2-2 4-3s5-1 9-2c3 0 8 0 13 0 6 0 10 0 14 0 3 1 6 1 8 2s4 2 5 3c0 1 1 2 1 3zM1929 157c-8-9-16-16-23-21-8-5-15-7-23-7s-14 1-19 5c-5 3-9 8-13 13-3 6-5 13-7 20-1 7-2 14-2 21 0 8 1 16 2 23s4 14 7 19c3 6 7 11 12 14 5 4 11 6 19 6 4 0 7-1 11-2s7-3 11-5c4-3 7-5 12-9 4-4 8-9 13-14z">
          <text:p/>
        </draw:path>
        <draw:path draw:style-name="gr10" draw:text-style-name="P11" draw:layer="layout" svg:width="2.057cm" svg:height="0.292cm" svg:x="6.384cm" svg:y="2.908cm" svg:viewBox="0 0 2058 293" svg:d="M187 209c0 13-2 26-8 37-5 10-13 19-23 26-9 7-20 12-33 16-13 3-27 5-41 5-10 0-19 0-28-2-8-1-16-3-23-5-6-3-11-5-16-7-4-2-7-4-9-6s-3-5-4-8-2-8-2-14c0-5 1-9 1-11 0-3 1-6 2-7 0-2 1-3 2-4s2-1 4-1 5 1 9 3 8 5 14 8c6 2 13 5 21 7s18 4 29 4c7 0 13-1 19-3 5-1 10-3 14-7 4-2 7-6 9-10s3-9 3-14c0-7-2-12-5-16-4-4-8-8-14-12-6-3-12-6-19-9s-15-6-23-10c-7-3-15-7-22-12-7-4-14-9-19-15-6-6-11-13-14-21-4-8-6-17-6-28 0-13 3-24 8-34s12-18 21-24c8-7 19-12 30-15 12-3 24-5 37-5 7 0 14 1 21 2 6 1 13 2 19 4 6 1 11 3 15 5 5 2 8 4 10 6 1 1 2 2 3 3 0 1 0 2 1 4 0 1 0 3 1 6 0 2 0 5 0 9s0 7-1 10c0 3 0 5-1 7 0 1-1 3-2 4s-2 1-4 1c-1 0-4-1-7-3-4-2-8-4-13-6-6-3-12-4-18-7-7-1-15-2-23-2-6 0-12 0-16 2-5 2-9 3-12 6s-5 5-7 9-2 8-2 12c0 6 1 11 5 15 3 4 8 8 14 11 5 4 12 7 19 10 8 3 15 6 23 9 8 4 15 7 23 12 7 4 13 9 19 16 6 6 11 13 14 20 4 8 5 18 5 29zM375 252c0 4 0 7 0 9 0 3 0 5-1 6 0 2-1 3-1 4s-2 3-4 4c-1 2-4 4-8 6-5 2-10 4-15 6s-11 3-18 4c-6 2-13 2-20 2-15 0-29-2-40-6-12-5-22-11-30-20s-14-19-18-32c-4-12-6-26-6-42 0-19 3-36 8-49s12-25 20-33c9-9 20-16 32-20s25-6 40-6c5 0 11 0 17 1s11 2 16 4 9 4 13 6 7 4 8 5c2 1 3 3 4 4s1 2 1 4c1 2 1 4 1 6s1 5 1 9c0 8-1 13-3 17-1 3-3 4-5 4-3 0-6-1-8-2-3-2-7-5-10-7-4-2-8-4-14-6-5-2-12-3-19-3-14 0-26 5-33 15-8 11-12 27-12 47 0 10 1 19 3 27 2 7 5 13 9 18 4 6 8 10 14 12 5 2 12 4 20 4 7 0 14-1 20-3 5-2 10-5 14-7 4-3 7-6 10-8s6-3 7-3c2 0 3 0 4 1s1 2 2 4c0 2 1 4 1 7s0 7 0 11zM543 113c0 5 0 10 0 13s-1 5-1 7c-1 2-2 3-3 4-1 0-2 1-3 1s-3 0-4-1c-2 0-3-1-5-1-2-1-4-1-6-2-3 0-5-1-8-1s-6 1-9 2-6 3-10 6c-3 2-6 5-10 9-3 5-7 11-12 17v115c0 1 0 2-1 3s-2 2-5 3c-2 1-4 1-8 1-4 1-8 1-13 1-6 0-10 0-14-1-3 0-6 0-8-1s-4-2-5-3-1-2-1-3v-186c0-1 0-2 1-3 0-1 2-2 4-3s4-1 7-2c3 0 7 0 12 0 4 0 8 0 11 0 4 1 6 1 7 2 2 1 4 2 4 3 1 1 1 2 1 3v23c5-7 10-12 15-17 4-4 9-8 13-10 4-3 8-5 12-6s9-2 13-2c2 0 4 0 6 1 2 0 4 0 7 1 2 0 4 1 6 2 2 0 3 1 4 1 1 1 1 2 2 3 0 1 0 2 1 3 0 1 0 4 0 7s0 6 0 11zM754 184c0 6-1 11-4 14s-8 5-13 5h-120c0 8 1 15 3 21s5 12 9 16c5 5 11 8 17 11 7 2 16 3 25 3 10 0 18-1 26-2 7-1 14-2 19-4s10-3 13-4c4-2 7-3 9-3 1 0 2 1 3 1 1 1 2 2 2 3 1 1 1 3 1 5 1 2 1 5 1 9 0 3 0 5 0 7-1 3-1 4-1 6 0 1-1 3-1 4-1 1-2 2-3 3s-3 2-8 4c-4 1-9 3-16 5-6 1-14 2-23 3-8 2-17 2-27 2-18 0-33-2-46-6-14-4-24-10-33-18-9-9-16-19-20-33-4-12-7-27-7-44s3-32 7-46c5-13 12-24 20-33 9-9 19-17 32-21 13-5 26-8 42-8s31 3 43 7c11 5 21 11 28 19 8 8 13 18 17 29s5 24 5 37zM700 169c1-15-2-27-9-35-7-9-17-13-31-13-7 0-14 2-19 4-5 3-9 6-13 10-3 4-6 9-8 15s-3 13-3 19zM988 184c0 6-2 11-4 14-4 3-8 5-13 5h-120c0 8 1 15 3 21s5 12 9 16c5 5 10 8 17 11 7 2 15 3 25 3 9 0 18-1 26-2 7-1 13-2 19-4 5-2 10-3 13-4 4-2 6-3 9-3 1 0 2 1 3 1 1 1 2 2 2 3 1 1 1 3 1 5 1 2 1 5 1 9 0 3 0 5 0 7-1 3-1 4-1 6 0 1-1 3-1 4-1 1-2 2-3 3s-3 2-8 4c-4 1-9 3-16 5-7 1-14 2-23 3-8 2-18 2-27 2-18 0-33-2-46-6-14-4-25-10-33-18-10-9-17-19-21-33-4-12-7-27-7-44s3-32 7-46c5-13 11-24 21-33 9-9 19-17 32-21 12-5 26-8 42-8s30 3 42 7c12 5 22 11 29 19 8 8 13 18 17 29 3 11 5 24 5 37zM934 169c1-15-3-27-9-35-7-9-17-13-31-13-7 0-14 2-19 4-5 3-10 6-13 10s-6 9-8 15-3 13-3 19zM1220 282c0 1 0 2-1 3s-3 2-5 3-5 1-8 1c-4 1-8 1-14 1-5 0-10 0-13-1-4 0-7 0-9-1s-3-2-4-3-1-2-1-3v-106c0-9-1-15-3-22-1-5-3-9-6-13-2-3-6-6-10-8s-9-3-15-3c-7 0-14 2-21 7-8 5-15 12-23 21v124c0 1 0 2-1 3s-3 2-5 3-5 1-8 1c-4 1-8 1-14 1-5 0-9 0-13-1-4 0-6 0-8-1-3-1-4-2-5-3s-1-2-1-3v-186c0-1 0-2 1-3 0-1 2-2 3-3 3-1 5-1 8-2 3 0 7 0 12 0 4 0 8 0 11 0 3 1 6 1 7 2 2 1 3 2 4 3s1 2 1 3v22c11-11 22-20 33-25 12-6 23-9 36-9s24 3 33 7c10 4 17 9 23 16s10 16 12 25c3 10 4 21 4 36zM1417 229c0 11-2 20-6 28s-10 15-18 20c-7 6-16 10-27 12-10 3-22 4-34 4-7 0-14 0-21-1s-13-3-18-4c-5-2-10-3-13-5-4-2-6-3-8-5-2-1-3-3-4-6s-1-8-1-14c0-4 0-7 0-10 1-2 1-4 2-6 0-1 1-2 2-2 1-1 2-1 3-1 2 0 4 1 7 2 3 2 7 4 12 6s10 4 17 6c6 2 13 3 21 3 5 0 9-1 13-2s8-2 10-4c4-2 6-4 7-7s2-6 2-9c0-5-1-8-4-11s-6-6-11-8c-4-2-9-4-15-6s-11-4-17-6c-6-3-12-5-18-9-6-2-11-6-15-10-5-5-8-10-11-16-3-7-4-15-4-24s2-17 6-24c3-7 8-14 15-19s16-9 26-12 21-5 33-5c6 0 12 1 18 2s11 2 16 3 9 3 12 4 5 2 7 3c1 2 2 3 3 4 0 1 1 2 1 4 0 1 1 3 1 5s0 4 0 8c0 3 0 7 0 9s-1 4-1 5c-1 2-1 3-2 3-1 1-2 1-3 1-2 0-4-1-7-2-2-2-6-3-10-5s-9-3-15-5c-5-1-12-2-19-2-5 0-9 1-13 2-3 1-6 2-8 4-3 2-5 4-6 6-1 3-2 5-2 8 0 4 2 8 4 10 3 4 7 6 12 9 4 2 9 4 15 7 6 1 12 3 18 6 6 2 12 5 17 8 6 3 12 6 16 11 5 4 8 10 11 16s4 13 4 21zM1643 282c0 1 0 2-1 3s-2 2-4 3c-3 1-5 1-9 1-4 1-8 1-13 1-6 0-10 0-14-1-4 0-6 0-8-1-3-1-4-2-5-3s-1-2-1-3v-106c0-9-1-15-2-22-2-5-4-9-6-13-3-3-7-6-11-8s-9-3-14-3c-7 0-15 2-22 7s-15 12-22 21v124c0 1-1 2-2 3s-2 2-4 3c-3 1-5 1-9 1-3 1-8 1-13 1-6 0-10 0-14-1-3 0-6 0-8-1s-4-2-5-3-1-2-1-3v-273c0-1 0-3 1-4s3-2 5-3c2 0 5-1 8-1 4-1 8-1 14-1 5 0 10 0 13 1 4 0 6 1 9 1 2 1 3 2 4 3s2 3 2 4v102c9-9 19-16 29-20s20-7 31-7c13 0 25 3 34 7s17 9 22 17c6 7 10 15 13 25 2 9 3 21 3 36zM1901 187c0 16-2 31-6 43-5 14-12 25-20 34-9 9-21 17-34 22-14 5-30 7-48 7-17 0-33-2-46-6-13-5-23-12-32-20-9-9-15-20-19-32-4-13-6-27-6-44 0-16 2-30 7-44 4-13 11-24 20-33s20-17 33-22c14-5 30-8 48-8s33 3 46 7c13 5 24 11 32 20 9 9 15 19 19 32s6 28 6 44zM1844 190c0-9-1-18-2-26-2-8-4-15-8-20-4-6-9-10-15-14-6-3-14-4-23-4-8 0-16 1-22 4s-11 7-15 12c-4 6-7 12-9 21-2 7-3 16-3 26 0 9 1 17 2 25 2 8 5 14 9 20 3 6 8 10 14 13s14 5 23 5c8 0 16-1 22-4s11-7 15-13c4-5 7-12 9-19 2-8 3-17 3-26zM2058 264c0 6 0 10-1 13-1 4-2 6-3 7s-3 3-6 4c-2 1-5 2-9 2-3 1-7 2-11 2-4 1-8 1-13 1-11 0-20-2-28-4-8-3-15-7-20-12-6-6-9-13-12-21-2-8-4-18-4-29v-96h-23c-3 0-5-1-7-5-1-3-2-8-2-16 0-4 0-7 0-10 1-2 2-5 2-6 1-2 2-3 3-4s2-1 4-1h23v-41c0-1 1-3 1-4 1-1 3-2 5-3 2 0 5-1 8-1 4 0 8-1 14-1 5 0 10 1 14 1 3 0 6 1 8 1 2 1 3 2 5 3 0 1 1 3 1 4v41h43c1 0 2 0 4 1 1 1 2 2 2 4 1 1 1 4 2 6 0 3 0 6 0 10 0 8 0 13-2 16-1 4-3 5-6 5h-43v88c0 10 1 17 5 23 3 5 9 7 18 7 3 0 6 0 8-1 2 0 4-1 6-1 2-1 4-1 5-2 1 0 2 0 3 0s2 0 3 0c1 1 1 2 2 3 0 2 0 4 1 6 0 3 0 6 0 10z">
          <text:p/>
        </draw:path>
        <draw:frame draw:style-name="gr2" draw:text-style-name="P3" draw:layer="layout" svg:width="0.387cm" svg:height="0.39cm" svg:x="17.073cm" svg:y="13.019cm">
          <draw:text-box>
            <text:p text:style-name="P1"><text:span text:style-name="T2"><text:s/></text:span></text:p>
          </draw:text-box>
        </draw:frame>
        <draw:line draw:style-name="gr11" draw:text-style-name="P8" draw:layer="layout" svg:x1="2.495cm" svg:y1="3.259cm" svg:x2="2.495cm" svg:y2="2.774cm">
          <text:p/>
        </draw:line>
        <draw:line draw:style-name="gr11" draw:text-style-name="P8" draw:layer="layout" svg:x1="2.495cm" svg:y1="3.259cm" svg:x2="2.495cm" svg:y2="2.774cm">
          <text:p/>
        </draw:line>
        <draw:frame draw:style-name="gr2" draw:text-style-name="P3" draw:layer="layout" svg:width="0.387cm" svg:height="0.39cm" svg:x="8.462cm" svg:y="2.906cm">
          <draw:text-box>
            <text:p text:style-name="P1"><text:span text:style-name="T2"><text:s/></text:span></text:p>
          </draw:text-box>
        </draw:frame>
        <draw:frame draw:style-name="gr7" draw:text-style-name="P8" draw:layer="layout" svg:width="15.92cm" svg:height="8.714cm" svg:x="2.9cm" svg:y="4.45cm">
          <draw:image xlink:href="Pictures/10000000000004E5000002AE4037A274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7cm" fo:margin-bottom="13cm" fo:margin-left="2.4cm" fo:margin-right="1cm" fo:page-width="21.004cm" fo:page-height="29.6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7-19T08:19:29.927541300</dc:date>
    <meta:editing-duration>PT2M5S</meta:editing-duration>
    <meta:editing-cycles>1</meta:editing-cycles>
    <meta:document-statistic meta:object-count="282"/>
    <meta:generator>LibreOffice/26.2.4.2$Windows_X86_64 LibreOffice_project/0229ac93fcf0d7cbc6376066c6f35021cef002dc</meta:generator>
  </office:meta>
</office:document-meta>
</file>